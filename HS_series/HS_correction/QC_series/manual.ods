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01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0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de59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fo:border-bottom="0.74pt dotted #000000" fo:background-color="#3faf4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0.74pt dotted #000000" fo:background-color="#3faf4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2" table:default-cell-style-name="ce7"/>
        <table:table-row table:style-name="ro1">
          <table:table-cell table:style-name="ce1" office:value-type="string" calcext:value-type="string">
            <text:p>Stazione</text:p>
          </table:table-cell>
          <table:table-cell table:style-name="ce1" office:value-type="string" calcext:value-type="string">
            <text:p>Annate da scartare</text:p>
          </table:table-cell>
          <table:table-cell table:style-name="ce1" office:value-type="string" calcext:value-type="string">
            <text:p>Azioni da intraprendere</text:p>
          </table:table-cell>
        </table:table-row>
        <table:table-row table:style-name="ro1">
          <table:table-cell office:value-type="string" calcext:value-type="string">
            <text:p>HSD_CH_ABO_MAN</text:p>
          </table:table-cell>
          <table:table-cell office:value-type="float" office:value="2014" calcext:value-type="float">
            <text:p>2014</text:p>
          </table:table-cell>
          <table:table-cell table:style-name="ce8" office:value-type="string" calcext:value-type="string">
            <text:p>Drop 2011</text:p>
            <text:p/>
            <text:p>Ampliare finestra d’intervento da 15/05 a 15/10. Sistemare gap e mettere a zero sotto I 2 cm</text:p>
          </table:table-cell>
        </table:table-row>
        <table:table-row table:style-name="ro1">
          <table:table-cell office:value-type="string" calcext:value-type="string">
            <text:p>HSD_CH_BLA</text:p>
          </table:table-cell>
          <table:table-cell/>
          <table:table-cell office:value-type="string" calcext:value-type="string">
            <text:p>Mettere a zero sotto I 2 cm. Ampliare finestra d’intervento da 01/06 a 30/09. Non ci sono gap</text:p>
          </table:table-cell>
        </table:table-row>
        <table:table-row table:style-name="ro1">
          <table:table-cell office:value-type="string" calcext:value-type="string">
            <text:p>HSD_CH_BLA_MAN</text:p>
          </table:table-cell>
          <table:table-cell/>
          <table:table-cell office:value-type="string" calcext:value-type="string">
            <text:p>2007, 2008, 2010 drop</text:p>
            <text:p/>
            <text:p>Ampliare finestra d’intervento da 01/06 a 30/09. Gap da sistemare e mettere a zero sotto I 2 cm.</text:p>
          </table:table-cell>
        </table:table-row>
        <table:table-row table:style-name="ro1">
          <table:table-cell office:value-type="string" calcext:value-type="string">
            <text:p>HSD_CH_CDF</text:p>
          </table:table-cell>
          <table:table-cell office:value-type="string" calcext:value-type="string">
            <text:p>2009, 2010</text:p>
          </table:table-cell>
          <table:table-cell office:value-type="string" calcext:value-type="string">
            <text:p>Ampliare finestra d’intervento da 01/05 a 31/10. Riempire I gap e mettere a zero sotto I 2 cm.</text:p>
          </table:table-cell>
        </table:table-row>
        <table:table-row table:style-name="ro1">
          <table:table-cell office:value-type="string" calcext:value-type="string">
            <text:p>HSD_CH_CDF_M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nestra d’intervento da 01/06 a 30/09 va bene. Sistemare I gap e mettere a zero sotto I 2 cm,</text:p>
          </table:table-cell>
        </table:table-row>
        <table:table-row table:style-name="ro1">
          <table:table-cell office:value-type="string" calcext:value-type="string">
            <text:p>HSD_CH_DAV</text:p>
          </table:table-cell>
          <table:table-cell office:value-type="string" calcext:value-type="string">
            <text:p>2009, 2015, 2016</text:p>
          </table:table-cell>
          <table:table-cell office:value-type="string" calcext:value-type="string">
            <text:p>2014 spike</text:p>
            <text:p/>
            <text:p>Ampliare finestra d’intervento da 01/06 a 30/09. Sistemare I gap e mettere a zero sotto I 2 cm.</text:p>
          </table:table-cell>
        </table:table-row>
        <table:table-row table:style-name="ro1">
          <table:table-cell office:value-type="string" calcext:value-type="string">
            <text:p>HSD_CH_DAV_MAN</text:p>
          </table:table-cell>
          <table:table-cell/>
          <table:table-cell office:value-type="string" calcext:value-type="string">
            <text:p>Ampliare finestra d’intervento da 01/06 a 30/09. Sistemare I gap e mettere a zero sotto I 2 cm</text:p>
          </table:table-cell>
        </table:table-row>
        <table:table-row table:style-name="ro1">
          <table:table-cell office:value-type="string" calcext:value-type="string">
            <text:p>HSD_CH_DIS</text:p>
          </table:table-cell>
          <table:table-cell office:value-type="string" calcext:value-type="string">
            <text:p>2009, 2011</text:p>
          </table:table-cell>
          <table:table-cell table:style-name="ce8" office:value-type="string" calcext:value-type="string">
            <text:p>Ampliare finestra d’intervento da 01/05 a 15/10. Riempire gap e mettere a zero sotto I 2 cm. Valutare visivamente se basta o serve di più</text:p>
          </table:table-cell>
        </table:table-row>
        <table:table-row table:style-name="ro1">
          <table:table-cell office:value-type="string" calcext:value-type="string">
            <text:p>HSD_CH_DIS_MAN</text:p>
          </table:table-cell>
          <table:table-cell office:value-type="float" office:value="2013" calcext:value-type="float">
            <text:p>2013</text:p>
          </table:table-cell>
          <table:table-cell table:style-name="ce8" office:value-type="string" calcext:value-type="string">
            <text:p>2009, 2012 drop</text:p>
            <text:p/>
            <text:p>Ampliare la finestra d’intervento da 15/05 a 15/10. Riempire I gap e mettere a zero sotto 2 cm. Serve di più o basta così?</text:p>
          </table:table-cell>
        </table:table-row>
        <table:table-row table:style-name="ro1">
          <table:table-cell office:value-type="string" calcext:value-type="string">
            <text:p>HSD_CH_DOL</text:p>
          </table:table-cell>
          <table:table-cell office:value-type="string" calcext:value-type="string">
            <text:p>2009, 2010</text:p>
          </table:table-cell>
          <table:table-cell table:style-name="ce8" office:value-type="string" calcext:value-type="string">
            <text:p>Ampliare finestra d’intervento da 15/05 a 30/09. Sistemare I gap e mettere a zero sotto I 2 cm.</text:p>
          </table:table-cell>
        </table:table-row>
        <table:table-row table:style-name="ro1">
          <table:table-cell office:value-type="string" calcext:value-type="string">
            <text:p>HSD_CH_DOL_MAN</text:p>
          </table:table-cell>
          <table:table-cell office:value-type="string" calcext:value-type="string">
            <text:p>1990, 1993, 1994</text:p>
          </table:table-cell>
          <table:table-cell office:value-type="string" calcext:value-type="string">
            <text:p>1986 drop</text:p>
            <text:p/>
            <text:p>Ampliare finestra d’intervento da 01/06 a 15/09. Riempire I gap e mettere a zero sotto I 2 cm.</text:p>
            <text:p/>
            <text:p/>
          </table:table-cell>
        </table:table-row>
        <table:table-row table:style-name="ro1">
          <table:table-cell office:value-type="string" calcext:value-type="string">
            <text:p>HSD_CH_ENG</text:p>
          </table:table-cell>
          <table:table-cell office:value-type="string" calcext:value-type="string">
            <text:p>2009:2012</text:p>
          </table:table-cell>
          <table:table-cell office:value-type="string" calcext:value-type="string">
            <text:p>2014 drop</text:p>
            <text:p/>
            <text:p>Ampliare finestra d’intervento da 10/05 a 20/10. Riempire I gap se presenti e mettere a zero sotto I 2 cm.</text:p>
          </table:table-cell>
        </table:table-row>
        <table:table-row table:style-name="ro1">
          <table:table-cell office:value-type="string" calcext:value-type="string">
            <text:p>HSD_CH_ENG_MAN</text:p>
          </table:table-cell>
          <table:table-cell/>
          <table:table-cell office:value-type="string" calcext:value-type="string">
            <text:p>Ampliare finestra d’intervento da 01/05 a 15/10. Riempire gap e mettere a zero sotto I 2 cm. Valutare visivamente se basta o serve di più</text:p>
          </table:table-cell>
        </table:table-row>
        <table:table-row table:style-name="ro1">
          <table:table-cell office:value-type="string" calcext:value-type="string">
            <text:p>HSD_CH_GRH</text:p>
          </table:table-cell>
          <table:table-cell office:value-type="string" calcext:value-type="string">
            <text:p>2009, 2011</text:p>
          </table:table-cell>
          <table:table-cell table:style-name="ce8" office:value-type="string" calcext:value-type="string">
            <text:p>2010, 2014 drop, 2015, 2020 spike</text:p>
            <text:p/>
            <text:p>Modificare finestra d’intervento da 20/06 a 30/09. Riempire I gap se necessario e mettere a zero sotto I 5 cm</text:p>
          </table:table-cell>
        </table:table-row>
        <table:table-row table:style-name="ro1">
          <table:table-cell office:value-type="string" calcext:value-type="string">
            <text:p>HSD_CH_GRH_M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09 drop</text:p>
            <text:p/>
            <text:p>Modificare finestra d’intervento da 03/07 a 15/09. Riempire I gap se necessario e mettere a zero sotto I 5 cm</text:p>
          </table:table-cell>
        </table:table-row>
        <table:table-row table:style-name="ro1">
          <table:table-cell office:value-type="string" calcext:value-type="string">
            <text:p>HSD_CH_GUE</text:p>
          </table:table-cell>
          <table:table-cell office:value-type="string" calcext:value-type="string">
            <text:p>2009, 2010, 2015</text:p>
          </table:table-cell>
          <table:table-cell office:value-type="string" calcext:value-type="string">
            <text:p>2016, 2019 spike</text:p>
            <text:p/>
            <text:p>Ampliare finestra d’intervento da 01/07 a 15/09. Riempire I gap se necessario e mettere a zero sotto I 3 cm.</text:p>
          </table:table-cell>
        </table:table-row>
        <table:table-row table:style-name="ro1">
          <table:table-cell office:value-type="string" calcext:value-type="string">
            <text:p>HSD_CH_GUE_MAN</text:p>
          </table:table-cell>
          <table:table-cell/>
          <table:table-cell office:value-type="string" calcext:value-type="string">
            <text:p>1988 drop</text:p>
            <text:p/>
            <text:p>No finestra d’intervento. Riempire gap e mettere a zero sotto I 3 cm.</text:p>
          </table:table-cell>
        </table:table-row>
        <table:table-row table:style-name="ro1">
          <table:table-cell office:value-type="string" calcext:value-type="string">
            <text:p>HSD_CH_PLF</text:p>
          </table:table-cell>
          <table:table-cell office:value-type="string" calcext:value-type="string">
            <text:p>2009, 2011, 2014, 2016</text:p>
          </table:table-cell>
          <table:table-cell office:value-type="string" calcext:value-type="string">
            <text:p>Ampliare finestra d’intervento da 01/05 a 15/10. Riempire gap e mettere a zero sotto I 2 cm. Basta o serve di più?</text:p>
          </table:table-cell>
        </table:table-row>
        <table:table-row table:style-name="ro1">
          <table:table-cell office:value-type="string" calcext:value-type="string">
            <text:p>HSD_CH_PLF_MAN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CH_ROB</text:p>
          </table:table-cell>
          <table:table-cell office:value-type="string" calcext:value-type="string">
            <text:p>2009, 2017</text:p>
          </table:table-cell>
          <table:table-cell office:value-type="string" calcext:value-type="string">
            <text:p>2019 spike</text:p>
            <text:p/>
            <text:p>Ampliare finestra d’intervento da 01/05 a 01/11. Riempire I gap e mettere a zero sotto I 2 cm.</text:p>
          </table:table-cell>
        </table:table-row>
        <table:table-row table:style-name="ro1">
          <table:table-cell office:value-type="string" calcext:value-type="string">
            <text:p>HSD_CH_ROB_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08, 2009, 2010, 2013 drop</text:p>
            <text:p/>
            <text:p>Ampliare finestra d’intervento da 01/05 a 15/10. Riempire gap e mettere a zero sotto I 2 cm.</text:p>
          </table:table-cell>
        </table:table-row>
        <table:table-row table:style-name="ro1">
          <table:table-cell office:value-type="string" calcext:value-type="string">
            <text:p>HSD_CH_S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0 spike</text:p>
            <text:p/>
            <text:p>Ampliare finestra d’intervento da 15/05 a 15/10. Riempire gap se necessario e mettere a zero sotto I 3 cm. Basta o serve di più?</text:p>
          </table:table-cell>
        </table:table-row>
        <table:table-row table:style-name="ro1">
          <table:table-cell office:value-type="string" calcext:value-type="string">
            <text:p>HSD_CH_SAM_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982 spike, 2012 drop</text:p>
            <text:p/>
            <text:p>Ampliare finestra d’intervento da 15/05 a 15/10. Riempire gap se necessario e mettere a zero sotto I 3 cm. Basta o serve di più?</text:p>
          </table:table-cell>
        </table:table-row>
        <table:table-row table:style-name="ro1">
          <table:table-cell office:value-type="string" calcext:value-type="string">
            <text:p>HSD_CH_SBE</text:p>
          </table:table-cell>
          <table:table-cell office:value-type="string" calcext:value-type="string">
            <text:p>2009, 2019</text:p>
          </table:table-cell>
          <table:table-cell office:value-type="string" calcext:value-type="string">
            <text:p>Ampliare finestra d’intervento da 15/05 a 05/10. Riempire gap se necessario e mettere a zero sotto I 2 cm. Basta?</text:p>
          </table:table-cell>
        </table:table-row>
        <table:table-row table:style-name="ro1">
          <table:table-cell office:value-type="string" calcext:value-type="string">
            <text:p>HSD_CH_SBE_MAN</text:p>
          </table:table-cell>
          <table:table-cell office:value-type="string" calcext:value-type="string">
            <text:p>1982, 2006</text:p>
          </table:table-cell>
          <table:table-cell office:value-type="string" calcext:value-type="string">
            <text:p>2001 spike</text:p>
            <text:p/>
            <text:p>Ampliare finestra d’intervento da 15/06 a 30/09. Riempire gap se necessario e mettere a zero sotto I 2 cm. Non so se basta, grafici troppo schiacciati.</text:p>
          </table:table-cell>
        </table:table-row>
        <table:table-row table:style-name="ro1">
          <table:table-cell office:value-type="string" calcext:value-type="string">
            <text:p>HSD_CH_SCU</text:p>
          </table:table-cell>
          <table:table-cell office:value-type="string" calcext:value-type="string">
            <text:p>2009:2011</text:p>
          </table:table-cell>
          <table:table-cell office:value-type="string" calcext:value-type="string">
            <text:p>2019 spike</text:p>
            <text:p/>
            <text:p>Ampliare finestra d’intervento da 01/05 a 15/10. Riempire gap se necessario e mettere a zero sotto I 2 cm. Non so se basta, grafici schiacciati.</text:p>
          </table:table-cell>
        </table:table-row>
        <table:table-row table:style-name="ro1">
          <table:table-cell office:value-type="string" calcext:value-type="string">
            <text:p>HSD_CH_SCU_M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04 spike, 2005 drop</text:p>
            <text:p/>
            <text:p>Ampliare finestra d’intervento da 01/05 a 15/10. Riempire gap se necessario e mettere a zero sotto I 2 cm.</text:p>
          </table:table-cell>
        </table:table-row>
        <table:table-row table:style-name="ro1">
          <table:table-cell office:value-type="string" calcext:value-type="string">
            <text:p>HSD_CH_ULR</text:p>
          </table:table-cell>
          <table:table-cell office:value-type="string" calcext:value-type="string">
            <text:p>2009, 2017</text:p>
          </table:table-cell>
          <table:table-cell office:value-type="string" calcext:value-type="string">
            <text:p>2016 drop</text:p>
            <text:p/>
            <text:p>Ampliare finestra d’intervento da 01/05 a 31/10. Riempire gap se necessario e mettere a zero sotto I 2 cm.</text:p>
          </table:table-cell>
        </table:table-row>
        <table:table-row table:style-name="ro1">
          <table:table-cell office:value-type="string" calcext:value-type="string">
            <text:p>HSD_CH_ULR_MAN</text:p>
          </table:table-cell>
          <table:table-cell office:value-type="string" calcext:value-type="string">
            <text:p>2000, 2015</text:p>
          </table:table-cell>
          <table:table-cell office:value-type="string" calcext:value-type="string">
            <text:p>2008, 2010, 2011, 2013 drop</text:p>
            <text:p/>
            <text:p>Ampliare finestra d’intervento da 15/05 a 15/10. Riempire gap se necessario e mettere a zero sotto I 2 cm.</text:p>
          </table:table-cell>
        </table:table-row>
        <table:table-row table:style-name="ro1">
          <table:table-cell office:value-type="string" calcext:value-type="string">
            <text:p>HSD_CH_ZER</text:p>
          </table:table-cell>
          <table:table-cell office:value-type="string" calcext:value-type="string">
            <text:p>2009, 2011, 2014, 2016:2019</text:p>
          </table:table-cell>
          <table:table-cell office:value-type="string" calcext:value-type="string">
            <text:p>Ampliare finestra d’intervento da 01/05 a 31/10. Riempire I gap e mettere a zero sotto I 2 cm.</text:p>
          </table:table-cell>
        </table:table-row>
        <table:table-row table:style-name="ro1">
          <table:table-cell office:value-type="string" calcext:value-type="string">
            <text:p>HSD_CH_ZER_M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mpliare finestra d’intervento da 15/05 a 15/10. Riempire I gap e mettere a zero sotto I 2 cm.</text:p>
          </table:table-cell>
        </table:table-row>
        <table:table-row table:style-name="ro1">
          <table:table-cell office:value-type="string" calcext:value-type="string">
            <text:p>HSD_TAA_TN_DAONE_MALGA_BISSINA</text:p>
          </table:table-cell>
          <table:table-cell office:value-type="string" calcext:value-type="string">
            <text:p>2012, 2019</text:p>
          </table:table-cell>
          <table:table-cell office:value-type="string" calcext:value-type="string">
            <text:p>Gestire offset sottraendo valor medio periodo 01/09 a 15/10. Ampliare finestra d’intervento da 15/05 a 15/10. Riempire I gap se necessario e mettere a zero sotto I 3 cm. Basta o no?</text:p>
          </table:table-cell>
        </table:table-row>
        <table:table-row table:style-name="ro1">
          <table:table-cell office:value-type="string" calcext:value-type="string">
            <text:p>HSD_TAA_TN_DAONE_MALGA_BISSINA_MAN</text:p>
          </table:table-cell>
          <table:table-cell office:value-type="string" calcext:value-type="string">
            <text:p>2003:2007, 2010</text:p>
          </table:table-cell>
          <table:table-cell office:value-type="string" calcext:value-type="string">
            <text:p>Ampliare finestra d’intervento da 01/06 a 30/09. Sistemare I gap e mettere a zero sotto I 2 cm</text:p>
          </table:table-cell>
        </table:table-row>
        <table:table-row table:style-name="ro1">
          <table:table-cell office:value-type="string" calcext:value-type="string">
            <text:p>HSD_TAA_TN_MONTE_BONDONE_VIO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21 drop</text:p>
            <text:p/>
            <text:p>Ampliare finestra d’intervento da 01/05 a 20/10. Sistemare gap se necessario e mettere a zero sotto I 3 cm. Basta o serve altro?</text:p>
          </table:table-cell>
        </table:table-row>
        <table:table-row table:style-name="ro1">
          <table:table-cell office:value-type="string" calcext:value-type="string">
            <text:p>HSD_TAA_TN_MONTE_BONDONE_VIOTE_MAN</text:p>
          </table:table-cell>
          <table:table-cell office:value-type="string" calcext:value-type="string">
            <text:p>2001:2005, 2010</text:p>
          </table:table-cell>
          <table:table-cell office:value-type="string" calcext:value-type="string">
            <text:p>Utilizzare finestra d’intervento da 01/06 a 30/09. Sistemare I gap e poi mettere a zero sotto I 2 cm. Basta o serve altro?</text:p>
          </table:table-cell>
        </table:table-row>
        <table:table-row table:style-name="ro1">
          <table:table-cell office:value-type="string" calcext:value-type="string">
            <text:p>HSD_TAA_TN_PASSO_BROCON</text:p>
          </table:table-cell>
          <table:table-cell/>
          <table:table-cell office:value-type="string" calcext:value-type="string">
            <text:p>Ampliare finestra d’intervento da 08/05 a 15/10. Sistemare gap se necessario e mettere a zero sotto I 4 cm. Basta o serve essere più aggressivi?</text:p>
          </table:table-cell>
        </table:table-row>
        <table:table-row table:style-name="ro1">
          <table:table-cell office:value-type="string" calcext:value-type="string">
            <text:p>HSD_TAA_TN_PASSO_BROCON_MAN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TAA_TN_PASSO_SOMMO</text:p>
          </table:table-cell>
          <table:table-cell/>
          <table:table-cell office:value-type="string" calcext:value-type="string">
            <text:p>Gestire offset sottraendo valor medio periodo da 01/09 a 20/10. Mettere a zero finestra da 01/05 a 20/10. Sistemare gap e poi mettere a zero sotto I 3 cm. Valutare visivamente se c’è altro rumore</text:p>
          </table:table-cell>
        </table:table-row>
        <table:table-row table:style-name="ro1">
          <table:table-cell office:value-type="string" calcext:value-type="string">
            <text:p>HSD_TAA_TN_PASSO_SOMMO_MAN</text:p>
          </table:table-cell>
          <table:table-cell office:value-type="string" calcext:value-type="string">
            <text:p>2000:2005, 2007, 2011</text:p>
          </table:table-cell>
          <table:table-cell office:value-type="string" calcext:value-type="string">
            <text:p>Ampliare finestra d’intervento da 15/04 a 31/10. Mettere a zero gap e mettere a zero sotto I 10 cm. Vedere che cosa succede ai grafici.</text:p>
          </table:table-cell>
        </table:table-row>
        <table:table-row table:style-name="ro1">
          <table:table-cell office:value-type="string" calcext:value-type="string">
            <text:p>HSD_TAA_TN_PASSO_TONA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estire offset sottraendo valor medio periodo da 15/07 a 31/08. Mettere a zero periodo da 15/05 a 05/10. Mettere a zero sotto I 3 cm. Basta o serve altro?</text:p>
          </table:table-cell>
        </table:table-row>
        <table:table-row table:style-name="ro1">
          <table:table-cell office:value-type="string" calcext:value-type="string">
            <text:p>HSD_TAA_TN_PASSO_TONALE_MAN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TAA_TN_PINZOLO</text:p>
          </table:table-cell>
          <table:table-cell office:value-type="string" calcext:value-type="string">
            <text:p>2012, 2013, 2015, 2016</text:p>
          </table:table-cell>
          <table:table-cell office:value-type="string" calcext:value-type="string">
            <text:p>Ampliare finestra d’intervento da 01/04 a 15/11. Mettere a zero sotto il cm. Nessun gap</text:p>
          </table:table-cell>
        </table:table-row>
        <table:table-row table:style-name="ro1">
          <table:table-cell office:value-type="string" calcext:value-type="string">
            <text:p>HSD_TAA_TN_PINZOLO_MAN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TAA_TN_ROVERETO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TAA_TN_ROVERETO_MAN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TAA_TN_TREMALZO</text:p>
          </table:table-cell>
          <table:table-cell office:value-type="string" calcext:value-type="string">
            <text:p>2016, 2017</text:p>
          </table:table-cell>
          <table:table-cell office:value-type="string" calcext:value-type="string">
            <text:p>Gestire offset sottraendo valor medio periodo da 01/09 a 15/10. Mettere a zero periodo da 01/05 a 25/10. Gestire gap e mettere a zero ulteriori 3 cm per togliere rumore. Basta o serve altro? </text:p>
          </table:table-cell>
        </table:table-row>
        <table:table-row table:style-name="ro1">
          <table:table-cell office:value-type="string" calcext:value-type="string">
            <text:p>HSD_TAA_TN_TREMALZO_MAN</text:p>
          </table:table-cell>
          <table:table-cell table:number-columns-repeated="2" office:value-type="string" calcext:value-type="string">
            <text:p>Eliminare la stazione</text:p>
          </table:table-cell>
        </table:table-row>
        <table:table-row table:style-name="ro1">
          <table:table-cell office:value-type="string" calcext:value-type="string">
            <text:p>HSD_TAA_TN_VERMIGLIO_CAPANNA_PRESENA</text:p>
          </table:table-cell>
          <table:table-cell office:value-type="string" calcext:value-type="string">
            <text:p>2014, 2015, 2017, 2020, 2021, 2023</text:p>
          </table:table-cell>
          <table:table-cell office:value-type="string" calcext:value-type="string">
            <text:p>Ampliare finestra d’intervento da 15/07 a 15/09. Mettere a zero sotto I 5 cm. Rimane altro rumore su cui intervenire manualmente</text:p>
          </table:table-cell>
        </table:table-row>
        <table:table-row table:style-name="ro1">
          <table:table-cell office:value-type="string" calcext:value-type="string">
            <text:p>HSD_TAA_TN_VERMIGLIO_CAPANNA_PRESENA_MAN</text:p>
          </table:table-cell>
          <table:table-cell table:number-columns-repeated="2" office:value-type="string" calcext:value-type="string">
            <text:p>Eliminare la stazi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 style:data-style-name="N2" text:time-value="15:25:02.457686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10:51:10.109617597</meta:creation-date>
    <dc:date>2026-05-29T19:52:15.549850016</dc:date>
    <meta:editing-duration>PT1H23M24S</meta:editing-duration>
    <meta:editing-cycles>15</meta:editing-cycles>
    <meta:generator>LibreOffice/24.2.7.2$Linux_X86_64 LibreOffice_project/420$Build-2</meta:generator>
    <meta:document-statistic meta:table-count="1" meta:cell-count="143" meta:object-count="0"/>
  </office:meta>
</office:document-meta>
</file>