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ed715" officeooo:paragraph-rsid="001ed715" style:font-size-asian="14pt" style:font-size-complex="16pt"/>
    </style:style>
    <style:style style:name="P2" style:family="paragraph" style:parent-style-name="Standard">
      <style:text-properties fo:font-size="16pt" officeooo:rsid="001ee9b7" officeooo:paragraph-rsid="001ee9b7" style:font-size-asian="14pt" style:font-size-complex="16pt"/>
    </style:style>
    <style:style style:name="P3" style:family="paragraph" style:parent-style-name="Standard">
      <style:text-properties fo:font-size="16pt" officeooo:rsid="0020dd07" officeooo:paragraph-rsid="0020dd07" style:font-size-asian="14pt" style:font-size-complex="16pt"/>
    </style:style>
    <style:style style:name="P4" style:family="paragraph" style:parent-style-name="Standard">
      <style:text-properties fo:font-size="16pt" officeooo:rsid="00217c5e" officeooo:paragraph-rsid="00217c5e" style:font-size-asian="14pt" style:font-size-complex="16pt"/>
    </style:style>
    <style:style style:name="P5" style:family="paragraph" style:parent-style-name="Standard">
      <style:text-properties fo:font-size="16pt" officeooo:rsid="0021af7b" officeooo:paragraph-rsid="0021af7b" style:font-size-asian="14pt" style:font-size-complex="16pt"/>
    </style:style>
    <style:style style:name="P6" style:family="paragraph" style:parent-style-name="Standard">
      <style:text-properties fo:font-size="16pt" officeooo:rsid="0023a5ef" officeooo:paragraph-rsid="0023a5ef" style:font-size-asian="14pt" style:font-size-complex="16pt"/>
    </style:style>
    <style:style style:name="P7" style:family="paragraph" style:parent-style-name="Standard">
      <style:text-properties fo:font-size="16pt" officeooo:rsid="00259938" officeooo:paragraph-rsid="00259938" style:font-size-asian="14pt" style:font-size-complex="16pt"/>
    </style:style>
    <style:style style:name="P8" style:family="paragraph" style:parent-style-name="Standard">
      <style:text-properties fo:font-size="16pt" officeooo:rsid="0027f39a" officeooo:paragraph-rsid="0027f39a" style:font-size-asian="14pt" style:font-size-complex="16pt"/>
    </style:style>
    <style:style style:name="P9" style:family="paragraph" style:parent-style-name="Standard">
      <style:text-properties fo:font-size="16pt" officeooo:rsid="002913f7" officeooo:paragraph-rsid="002913f7" style:font-size-asian="14pt" style:font-size-complex="16pt"/>
    </style:style>
    <style:style style:name="P10" style:family="paragraph" style:parent-style-name="Standard">
      <style:text-properties fo:font-size="16pt" officeooo:rsid="00295e0c" officeooo:paragraph-rsid="00295e0c" style:font-size-asian="14pt" style:font-size-complex="16pt"/>
    </style:style>
    <style:style style:name="P11" style:family="paragraph" style:parent-style-name="Standard">
      <style:text-properties fo:font-size="16pt" officeooo:rsid="0029f99b" officeooo:paragraph-rsid="0029f99b" style:font-size-asian="14pt" style:font-size-complex="16pt"/>
    </style:style>
    <style:style style:name="P12" style:family="paragraph" style:parent-style-name="Standard">
      <style:text-properties fo:font-size="16pt" officeooo:rsid="002ca36b" officeooo:paragraph-rsid="002ca36b" style:font-size-asian="14pt" style:font-size-complex="16pt"/>
    </style:style>
    <style:style style:name="P13" style:family="paragraph" style:parent-style-name="Standard">
      <style:text-properties fo:font-size="16pt" officeooo:rsid="002d411c" officeooo:paragraph-rsid="002d411c" style:font-size-asian="14pt" style:font-size-complex="16pt"/>
    </style:style>
    <style:style style:name="P14" style:family="paragraph" style:parent-style-name="Standard">
      <style:text-properties fo:font-size="16pt" officeooo:rsid="002d5830" officeooo:paragraph-rsid="002d5830" style:font-size-asian="14pt" style:font-size-complex="16pt"/>
    </style:style>
    <style:style style:name="P15" style:family="paragraph" style:parent-style-name="Standard">
      <style:text-properties fo:font-size="16pt" officeooo:rsid="002e0266" officeooo:paragraph-rsid="002e0266" style:font-size-asian="14pt" style:font-size-complex="16pt"/>
    </style:style>
    <style:style style:name="P16" style:family="paragraph" style:parent-style-name="Standard">
      <style:text-properties fo:font-size="16pt" officeooo:rsid="00320375" officeooo:paragraph-rsid="00320375" style:font-size-asian="14pt" style:font-size-complex="16pt"/>
    </style:style>
    <style:style style:name="P17" style:family="paragraph" style:parent-style-name="Standard">
      <style:text-properties fo:font-size="12pt" officeooo:rsid="001ed715" officeooo:paragraph-rsid="001ed715" style:font-size-asian="10.5pt" style:font-size-complex="12pt"/>
    </style:style>
    <style:style style:name="P18" style:family="paragraph" style:parent-style-name="Standard">
      <style:text-properties fo:font-size="12pt" officeooo:rsid="001ee9b7" officeooo:paragraph-rsid="001ee9b7" style:font-size-asian="10.5pt" style:font-size-complex="12pt"/>
    </style:style>
    <style:style style:name="P19" style:family="paragraph" style:parent-style-name="Standard">
      <style:text-properties fo:font-size="12pt" officeooo:rsid="0020dd07" officeooo:paragraph-rsid="0020dd07" style:font-size-asian="10.5pt" style:font-size-complex="12pt"/>
    </style:style>
    <style:style style:name="P20" style:family="paragraph" style:parent-style-name="Standard">
      <style:text-properties fo:font-size="12pt" officeooo:rsid="00217c5e" officeooo:paragraph-rsid="00217c5e" style:font-size-asian="10.5pt" style:font-size-complex="12pt"/>
    </style:style>
    <style:style style:name="P21" style:family="paragraph" style:parent-style-name="Standard">
      <style:text-properties fo:font-size="12pt" officeooo:rsid="0021af7b" officeooo:paragraph-rsid="0021af7b" style:font-size-asian="10.5pt" style:font-size-complex="12pt"/>
    </style:style>
    <style:style style:name="P22" style:family="paragraph" style:parent-style-name="Standard">
      <style:text-properties fo:font-size="12pt" officeooo:rsid="0023a5ef" officeooo:paragraph-rsid="0023a5ef" style:font-size-asian="10.5pt" style:font-size-complex="12pt"/>
    </style:style>
    <style:style style:name="P23" style:family="paragraph" style:parent-style-name="Standard">
      <style:text-properties fo:font-size="12pt" officeooo:rsid="00259938" officeooo:paragraph-rsid="00259938" style:font-size-asian="10.5pt" style:font-size-complex="12pt"/>
    </style:style>
    <style:style style:name="P24" style:family="paragraph" style:parent-style-name="Standard">
      <style:text-properties fo:font-size="12pt" officeooo:rsid="0027f39a" officeooo:paragraph-rsid="0027f39a" style:font-size-asian="10.5pt" style:font-size-complex="12pt"/>
    </style:style>
    <style:style style:name="P25" style:family="paragraph" style:parent-style-name="Standard">
      <style:text-properties fo:font-size="12pt" officeooo:rsid="002913f7" officeooo:paragraph-rsid="002913f7" style:font-size-asian="10.5pt" style:font-size-complex="12pt"/>
    </style:style>
    <style:style style:name="P26" style:family="paragraph" style:parent-style-name="Standard">
      <style:text-properties fo:font-size="12pt" officeooo:rsid="00295e0c" officeooo:paragraph-rsid="00295e0c" style:font-size-asian="10.5pt" style:font-size-complex="12pt"/>
    </style:style>
    <style:style style:name="P27" style:family="paragraph" style:parent-style-name="Standard">
      <style:text-properties fo:font-size="12pt" officeooo:rsid="002ab9ce" officeooo:paragraph-rsid="002ab9ce" style:font-size-asian="10.5pt" style:font-size-complex="12pt"/>
    </style:style>
    <style:style style:name="P28" style:family="paragraph" style:parent-style-name="Standard">
      <style:text-properties fo:font-size="12pt" officeooo:rsid="002d411c" officeooo:paragraph-rsid="002d411c" style:font-size-asian="10.5pt" style:font-size-complex="12pt"/>
    </style:style>
    <style:style style:name="P29" style:family="paragraph" style:parent-style-name="Standard">
      <style:text-properties fo:font-size="12pt" officeooo:rsid="002d5830" officeooo:paragraph-rsid="002d5830" style:font-size-asian="10.5pt" style:font-size-complex="12pt"/>
    </style:style>
    <style:style style:name="P30" style:family="paragraph" style:parent-style-name="Standard">
      <style:text-properties fo:font-size="12pt" officeooo:rsid="002e0266" officeooo:paragraph-rsid="002e0266" style:font-size-asian="10.5pt" style:font-size-complex="12pt"/>
    </style:style>
    <style:style style:name="P31" style:family="paragraph" style:parent-style-name="Standard">
      <style:text-properties fo:font-size="12pt" officeooo:rsid="002f9f07" officeooo:paragraph-rsid="002f9f07" style:font-size-asian="10.5pt" style:font-size-complex="12pt"/>
    </style:style>
    <style:style style:name="P32" style:family="paragraph" style:parent-style-name="Standard" style:list-style-name="L1">
      <style:text-properties fo:font-size="12pt" officeooo:rsid="001ed715" officeooo:paragraph-rsid="001ed715" style:font-size-asian="10.5pt" style:font-size-complex="12pt"/>
    </style:style>
    <style:style style:name="P33" style:family="paragraph" style:parent-style-name="Standard" style:list-style-name="L2">
      <style:text-properties fo:font-size="12pt" officeooo:rsid="001ee9b7" officeooo:paragraph-rsid="001ee9b7" style:font-size-asian="10.5pt" style:font-size-complex="12pt"/>
    </style:style>
    <style:style style:name="P34" style:family="paragraph" style:parent-style-name="Standard" style:list-style-name="L3">
      <style:text-properties fo:font-size="12pt" officeooo:rsid="0020dd07" officeooo:paragraph-rsid="0020dd07" style:font-size-asian="10.5pt" style:font-size-complex="12pt"/>
    </style:style>
    <style:style style:name="P35" style:family="paragraph" style:parent-style-name="Standard" style:list-style-name="L4">
      <style:text-properties fo:font-size="12pt" officeooo:rsid="00217c5e" officeooo:paragraph-rsid="00217c5e" style:font-size-asian="10.5pt" style:font-size-complex="12pt"/>
    </style:style>
    <style:style style:name="P36" style:family="paragraph" style:parent-style-name="Standard" style:list-style-name="L5">
      <style:text-properties fo:font-size="12pt" officeooo:rsid="0021af7b" officeooo:paragraph-rsid="0021af7b" style:font-size-asian="10.5pt" style:font-size-complex="12pt"/>
    </style:style>
    <style:style style:name="P37" style:family="paragraph" style:parent-style-name="Standard" style:list-style-name="L6">
      <style:text-properties fo:font-size="12pt" officeooo:rsid="0023a5ef" officeooo:paragraph-rsid="0023a5ef" style:font-size-asian="10.5pt" style:font-size-complex="12pt"/>
    </style:style>
    <style:style style:name="P38" style:family="paragraph" style:parent-style-name="Standard" style:list-style-name="L7">
      <style:text-properties fo:font-size="12pt" officeooo:rsid="0023a5ef" officeooo:paragraph-rsid="0023a5ef" style:font-size-asian="10.5pt" style:font-size-complex="12pt"/>
    </style:style>
    <style:style style:name="P39" style:family="paragraph" style:parent-style-name="Standard" style:list-style-name="L8">
      <style:text-properties fo:font-size="12pt" officeooo:rsid="00259938" officeooo:paragraph-rsid="00259938" style:font-size-asian="10.5pt" style:font-size-complex="12pt"/>
    </style:style>
    <style:style style:name="P40" style:family="paragraph" style:parent-style-name="Standard" style:list-style-name="L9">
      <style:text-properties fo:font-size="12pt" officeooo:rsid="0027f39a" officeooo:paragraph-rsid="0027f39a" style:font-size-asian="10.5pt" style:font-size-complex="12pt"/>
    </style:style>
    <style:style style:name="P41" style:family="paragraph" style:parent-style-name="Standard" style:list-style-name="L10">
      <style:text-properties fo:font-size="12pt" officeooo:rsid="0027f39a" officeooo:paragraph-rsid="0027f39a" style:font-size-asian="10.5pt" style:font-size-complex="12pt"/>
    </style:style>
    <style:style style:name="P42" style:family="paragraph" style:parent-style-name="Standard" style:list-style-name="L11">
      <style:text-properties fo:font-size="12pt" officeooo:rsid="002913f7" officeooo:paragraph-rsid="002913f7" style:font-size-asian="10.5pt" style:font-size-complex="12pt"/>
    </style:style>
    <style:style style:name="P43" style:family="paragraph" style:parent-style-name="Standard" style:list-style-name="L12">
      <style:text-properties fo:font-size="12pt" officeooo:rsid="00295e0c" officeooo:paragraph-rsid="00295e0c" style:font-size-asian="10.5pt" style:font-size-complex="12pt"/>
    </style:style>
    <style:style style:name="P44" style:family="paragraph" style:parent-style-name="Standard" style:list-style-name="L13">
      <style:text-properties fo:font-size="12pt" officeooo:rsid="0029f99b" officeooo:paragraph-rsid="002ab9ce" style:font-size-asian="10.5pt" style:font-size-complex="12pt"/>
    </style:style>
    <style:style style:name="P45" style:family="paragraph" style:parent-style-name="Standard" style:list-style-name="L13">
      <style:text-properties fo:font-size="12pt" officeooo:rsid="002ab9ce" officeooo:paragraph-rsid="002ab9ce" style:font-size-asian="10.5pt" style:font-size-complex="12pt"/>
    </style:style>
    <style:style style:name="P46" style:family="paragraph" style:parent-style-name="Standard" style:list-style-name="L14">
      <style:text-properties fo:font-size="12pt" officeooo:rsid="002d411c" officeooo:paragraph-rsid="002d411c" style:font-size-asian="10.5pt" style:font-size-complex="12pt"/>
    </style:style>
    <style:style style:name="P47" style:family="paragraph" style:parent-style-name="Standard" style:list-style-name="L15">
      <style:text-properties fo:font-size="12pt" officeooo:rsid="002d411c" officeooo:paragraph-rsid="002d411c" style:font-size-asian="10.5pt" style:font-size-complex="12pt"/>
    </style:style>
    <style:style style:name="P48" style:family="paragraph" style:parent-style-name="Standard" style:list-style-name="L16">
      <style:text-properties fo:font-size="12pt" officeooo:rsid="002d5830" officeooo:paragraph-rsid="002d5830" style:font-size-asian="10.5pt" style:font-size-complex="12pt"/>
    </style:style>
    <style:style style:name="P49" style:family="paragraph" style:parent-style-name="Standard" style:list-style-name="L17">
      <style:text-properties fo:font-size="12pt" officeooo:rsid="002e0266" officeooo:paragraph-rsid="002e0266" style:font-size-asian="10.5pt" style:font-size-complex="12pt"/>
    </style:style>
    <style:style style:name="P50" style:family="paragraph" style:parent-style-name="Standard" style:list-style-name="L18">
      <style:text-properties fo:font-size="12pt" officeooo:rsid="002e0266" officeooo:paragraph-rsid="002e0266" style:font-size-asian="10.5pt" style:font-size-complex="12pt"/>
    </style:style>
    <style:style style:name="P51" style:family="paragraph" style:parent-style-name="Standard" style:list-style-name="L19">
      <style:text-properties fo:font-size="12pt" officeooo:rsid="002e0266" officeooo:paragraph-rsid="002e0266" style:font-size-asian="10.5pt" style:font-size-complex="12pt"/>
    </style:style>
    <style:style style:name="P52" style:family="paragraph" style:parent-style-name="Standard" style:list-style-name="L20">
      <style:text-properties fo:font-size="12pt" officeooo:rsid="002e0266" officeooo:paragraph-rsid="002e0266" style:font-size-asian="10.5pt" style:font-size-complex="12pt"/>
    </style:style>
    <style:style style:name="P53" style:family="paragraph" style:parent-style-name="Standard" style:list-style-name="L20">
      <style:text-properties fo:font-size="12pt" officeooo:rsid="002f9f07" officeooo:paragraph-rsid="002f9f07" style:font-size-asian="10.5pt" style:font-size-complex="12pt"/>
    </style:style>
    <style:style style:name="P54" style:family="paragraph" style:parent-style-name="Standard" style:list-style-name="L21">
      <style:text-properties fo:font-size="12pt" officeooo:rsid="00320375" officeooo:paragraph-rsid="00320375" style:font-size-asian="10.5pt" style:font-size-complex="12pt"/>
    </style:style>
    <style:style style:name="P55" style:family="paragraph" style:parent-style-name="Standard">
      <style:text-properties fo:font-size="12pt" officeooo:rsid="00320375" officeooo:paragraph-rsid="00320375" style:font-size-asian="10.5pt" style:font-size-complex="12pt"/>
    </style:style>
    <style:style style:name="P56" style:family="paragraph" style:parent-style-name="Standard">
      <style:text-properties fo:font-size="12pt" officeooo:rsid="0033cee6" officeooo:paragraph-rsid="0033cee6" style:font-size-asian="10.5pt" style:font-size-complex="12pt"/>
    </style:style>
    <style:style style:name="P57" style:family="paragraph" style:parent-style-name="Standard" style:list-style-name="L22">
      <style:text-properties fo:font-size="12pt" officeooo:rsid="0033cee6" officeooo:paragraph-rsid="0033cee6" style:font-size-asian="10.5pt" style:font-size-complex="12pt"/>
    </style:style>
    <style:style style:name="P58" style:family="paragraph" style:parent-style-name="Standard">
      <style:text-properties fo:font-size="12pt" officeooo:rsid="0033ec83" officeooo:paragraph-rsid="0033ec83" style:font-size-asian="10.5pt" style:font-size-complex="12pt"/>
    </style:style>
    <style:style style:name="P59" style:family="paragraph" style:parent-style-name="Standard" style:list-style-name="L23">
      <style:text-properties fo:font-size="12pt" officeooo:rsid="0033ec83" officeooo:paragraph-rsid="0033ec83" style:font-size-asian="10.5pt" style:font-size-complex="12pt"/>
    </style:style>
    <style:style style:name="P60" style:family="paragraph" style:parent-style-name="Standard">
      <style:text-properties fo:font-size="12pt" officeooo:rsid="00350dc4" officeooo:paragraph-rsid="00350dc4" style:font-size-asian="10.5pt" style:font-size-complex="12pt"/>
    </style:style>
    <style:style style:name="P61" style:family="paragraph" style:parent-style-name="Standard" style:list-style-name="L24">
      <style:text-properties fo:font-size="12pt" officeooo:rsid="00350dc4" officeooo:paragraph-rsid="00350dc4" style:font-size-asian="10.5pt" style:font-size-complex="12pt"/>
    </style:style>
    <style:style style:name="P62" style:family="paragraph" style:parent-style-name="Standard">
      <style:text-properties fo:font-size="12pt" officeooo:rsid="00352ba7" officeooo:paragraph-rsid="00352ba7" style:font-size-asian="10.5pt" style:font-size-complex="12pt"/>
    </style:style>
    <style:style style:name="P63" style:family="paragraph" style:parent-style-name="Standard" style:list-style-name="L25">
      <style:text-properties fo:font-size="12pt" officeooo:rsid="00352ba7" officeooo:paragraph-rsid="00352ba7" style:font-size-asian="10.5pt" style:font-size-complex="12pt"/>
    </style:style>
    <style:style style:name="P64" style:family="paragraph" style:parent-style-name="Standard">
      <style:text-properties fo:font-size="12pt" officeooo:rsid="0037304a" officeooo:paragraph-rsid="0037304a" style:font-size-asian="10.5pt" style:font-size-complex="12pt"/>
    </style:style>
    <style:style style:name="P65" style:family="paragraph" style:parent-style-name="Standard" style:list-style-name="L26">
      <style:text-properties fo:font-size="12pt" officeooo:rsid="0037304a" officeooo:paragraph-rsid="0037304a" style:font-size-asian="10.5pt" style:font-size-complex="12pt"/>
    </style:style>
    <style:style style:name="P66" style:family="paragraph" style:parent-style-name="Standard" style:list-style-name="L27">
      <style:text-properties fo:font-size="12pt" officeooo:rsid="0037304a" officeooo:paragraph-rsid="0037304a" style:font-size-asian="10.5pt" style:font-size-complex="12pt"/>
    </style:style>
    <style:style style:name="P67" style:family="paragraph" style:parent-style-name="Standard">
      <style:text-properties fo:font-size="12pt" officeooo:rsid="0038266f" officeooo:paragraph-rsid="0038266f" style:font-size-asian="10.5pt" style:font-size-complex="12pt"/>
    </style:style>
    <style:style style:name="P68" style:family="paragraph" style:parent-style-name="Standard" style:list-style-name="L28">
      <style:text-properties fo:font-size="12pt" officeooo:rsid="0038266f" officeooo:paragraph-rsid="0038266f" style:font-size-asian="10.5pt" style:font-size-complex="12pt"/>
    </style:style>
    <style:style style:name="P69" style:family="paragraph" style:parent-style-name="Standard" style:list-style-name="L29">
      <style:text-properties fo:font-size="12pt" officeooo:rsid="0038266f" officeooo:paragraph-rsid="0038266f" style:font-size-asian="10.5pt" style:font-size-complex="12pt"/>
    </style:style>
    <style:style style:name="P70" style:family="paragraph" style:parent-style-name="Standard" style:list-style-name="L30">
      <style:text-properties fo:font-size="12pt" officeooo:rsid="0038266f" officeooo:paragraph-rsid="0038266f" style:font-size-asian="10.5pt" style:font-size-complex="12pt"/>
    </style:style>
    <style:style style:name="P71" style:family="paragraph" style:parent-style-name="Standard" style:list-style-name="L32">
      <style:text-properties fo:font-size="12pt" officeooo:rsid="0038ff15" officeooo:paragraph-rsid="0038ff15" style:font-size-asian="10.5pt" style:font-size-complex="12pt"/>
    </style:style>
    <style:style style:name="P72" style:family="paragraph" style:parent-style-name="Standard" style:list-style-name="L32">
      <style:text-properties fo:font-size="12pt" officeooo:rsid="003af98e" officeooo:paragraph-rsid="003af98e" style:font-size-asian="10.5pt" style:font-size-complex="12pt"/>
    </style:style>
    <style:style style:name="P73" style:family="paragraph" style:parent-style-name="Standard">
      <style:text-properties fo:font-size="12pt" officeooo:rsid="003af98e" officeooo:paragraph-rsid="003af98e" style:font-size-asian="10.5pt" style:font-size-complex="12pt"/>
    </style:style>
    <style:style style:name="P74" style:family="paragraph" style:parent-style-name="Standard" style:list-style-name="L33">
      <style:text-properties fo:font-size="12pt" officeooo:rsid="003af98e" officeooo:paragraph-rsid="003af98e" style:font-size-asian="10.5pt" style:font-size-complex="12pt"/>
    </style:style>
    <style:style style:name="P75" style:family="paragraph" style:parent-style-name="Standard" style:list-style-name="L34">
      <style:text-properties fo:font-size="12pt" officeooo:rsid="003af98e" officeooo:paragraph-rsid="003af98e" style:font-size-asian="10.5pt" style:font-size-complex="12pt"/>
    </style:style>
    <style:style style:name="P76" style:family="paragraph" style:parent-style-name="Standard">
      <style:text-properties fo:font-size="12pt" officeooo:rsid="003bdfb6" officeooo:paragraph-rsid="003bdfb6" style:font-size-asian="10.5pt" style:font-size-complex="12pt"/>
    </style:style>
    <style:style style:name="P77" style:family="paragraph" style:parent-style-name="Standard" style:list-style-name="L35">
      <style:text-properties fo:font-size="12pt" officeooo:rsid="003bdfb6" officeooo:paragraph-rsid="003bdfb6" style:font-size-asian="10.5pt" style:font-size-complex="12pt"/>
    </style:style>
    <style:style style:name="P78" style:family="paragraph" style:parent-style-name="Standard" style:list-style-name="L36">
      <style:text-properties fo:font-size="12pt" officeooo:rsid="003bdfb6" officeooo:paragraph-rsid="003bdfb6" style:font-size-asian="10.5pt" style:font-size-complex="12pt"/>
    </style:style>
    <style:style style:name="P79" style:family="paragraph" style:parent-style-name="Standard">
      <style:text-properties fo:font-size="12pt" officeooo:rsid="003cb4d5" officeooo:paragraph-rsid="003cb4d5" style:font-size-asian="10.5pt" style:font-size-complex="12pt"/>
    </style:style>
    <style:style style:name="P80" style:family="paragraph" style:parent-style-name="Standard" style:list-style-name="L37">
      <style:text-properties fo:font-size="12pt" officeooo:rsid="003cb4d5" officeooo:paragraph-rsid="003cb4d5" style:font-size-asian="10.5pt" style:font-size-complex="12pt"/>
    </style:style>
    <style:style style:name="P81" style:family="paragraph" style:parent-style-name="Standard" style:list-style-name="L38">
      <style:text-properties fo:font-size="12pt" officeooo:rsid="003cb4d5" officeooo:paragraph-rsid="003cb4d5" style:font-size-asian="10.5pt" style:font-size-complex="12pt"/>
    </style:style>
    <style:style style:name="P82" style:family="paragraph" style:parent-style-name="Standard" style:list-style-name="L39">
      <style:text-properties fo:font-size="12pt" officeooo:rsid="003cb4d5" officeooo:paragraph-rsid="003cb4d5" style:font-size-asian="10.5pt" style:font-size-complex="12pt"/>
    </style:style>
    <style:style style:name="P83" style:family="paragraph" style:parent-style-name="Standard">
      <style:text-properties fo:font-size="12pt" officeooo:rsid="003cd340" officeooo:paragraph-rsid="003cd340" style:font-size-asian="10.5pt" style:font-size-complex="12pt"/>
    </style:style>
    <style:style style:name="P84" style:family="paragraph" style:parent-style-name="Standard" style:list-style-name="L40">
      <style:text-properties fo:font-size="12pt" officeooo:rsid="003cd340" officeooo:paragraph-rsid="003cd340" style:font-size-asian="10.5pt" style:font-size-complex="12pt"/>
    </style:style>
    <style:style style:name="P85" style:family="paragraph" style:parent-style-name="Standard" style:list-style-name="L41">
      <style:text-properties fo:font-size="12pt" officeooo:rsid="003e7878" officeooo:paragraph-rsid="003e7878" style:font-size-asian="10.5pt" style:font-size-complex="12pt"/>
    </style:style>
    <style:style style:name="P86" style:family="paragraph" style:parent-style-name="Standard">
      <style:text-properties fo:font-size="12pt" officeooo:rsid="003f20ce" officeooo:paragraph-rsid="003f20ce" style:font-size-asian="10.5pt" style:font-size-complex="12pt"/>
    </style:style>
    <style:style style:name="P87" style:family="paragraph" style:parent-style-name="Standard" style:list-style-name="L42">
      <style:text-properties fo:font-size="12pt" officeooo:rsid="003f20ce" officeooo:paragraph-rsid="003f20ce" style:font-size-asian="10.5pt" style:font-size-complex="12pt"/>
    </style:style>
    <style:style style:name="P88" style:family="paragraph" style:parent-style-name="Standard" style:list-style-name="L43">
      <style:text-properties fo:font-size="12pt" officeooo:rsid="003f20ce" officeooo:paragraph-rsid="003f20ce" style:font-size-asian="10.5pt" style:font-size-complex="12pt"/>
    </style:style>
    <style:style style:name="P89" style:family="paragraph" style:parent-style-name="Standard">
      <style:text-properties fo:font-size="16pt" officeooo:rsid="0033cee6" officeooo:paragraph-rsid="0033cee6" style:font-size-asian="14pt" style:font-size-complex="16pt"/>
    </style:style>
    <style:style style:name="P90" style:family="paragraph" style:parent-style-name="Standard">
      <style:text-properties fo:font-size="16pt" officeooo:rsid="0033ec83" officeooo:paragraph-rsid="0033ec83" style:font-size-asian="14pt" style:font-size-complex="16pt"/>
    </style:style>
    <style:style style:name="P91" style:family="paragraph" style:parent-style-name="Standard">
      <style:text-properties fo:font-size="16pt" officeooo:rsid="00350dc4" officeooo:paragraph-rsid="00350dc4" style:font-size-asian="14pt" style:font-size-complex="16pt"/>
    </style:style>
    <style:style style:name="P92" style:family="paragraph" style:parent-style-name="Standard">
      <style:text-properties fo:font-size="16pt" officeooo:rsid="00352ba7" officeooo:paragraph-rsid="00352ba7" style:font-size-asian="14pt" style:font-size-complex="16pt"/>
    </style:style>
    <style:style style:name="P93" style:family="paragraph" style:parent-style-name="Standard">
      <style:text-properties fo:font-size="16pt" officeooo:rsid="0037304a" officeooo:paragraph-rsid="0037304a" style:font-size-asian="14pt" style:font-size-complex="16pt"/>
    </style:style>
    <style:style style:name="P94" style:family="paragraph" style:parent-style-name="Standard">
      <style:text-properties fo:font-size="16pt" officeooo:rsid="0038266f" officeooo:paragraph-rsid="0038266f" style:font-size-asian="14pt" style:font-size-complex="16pt"/>
    </style:style>
    <style:style style:name="P95" style:family="paragraph" style:parent-style-name="Standard">
      <style:text-properties fo:font-size="16pt" officeooo:rsid="0038ff15" officeooo:paragraph-rsid="0038ff15" style:font-size-asian="14pt" style:font-size-complex="16pt"/>
    </style:style>
    <style:style style:name="P96" style:family="paragraph" style:parent-style-name="Standard">
      <style:text-properties fo:font-size="16pt" officeooo:rsid="003af98e" officeooo:paragraph-rsid="003af98e" style:font-size-asian="14pt" style:font-size-complex="16pt"/>
    </style:style>
    <style:style style:name="P97" style:family="paragraph" style:parent-style-name="Standard">
      <style:text-properties fo:font-size="16pt" officeooo:rsid="003bdfb6" officeooo:paragraph-rsid="003bdfb6" style:font-size-asian="14pt" style:font-size-complex="16pt"/>
    </style:style>
    <style:style style:name="P98" style:family="paragraph" style:parent-style-name="Standard">
      <style:text-properties fo:font-size="16pt" officeooo:rsid="003cb4d5" officeooo:paragraph-rsid="003cb4d5" style:font-size-asian="14pt" style:font-size-complex="16pt"/>
    </style:style>
    <style:style style:name="P99" style:family="paragraph" style:parent-style-name="Standard">
      <style:text-properties fo:font-size="16pt" officeooo:rsid="003cd340" officeooo:paragraph-rsid="003cd340" style:font-size-asian="14pt" style:font-size-complex="16pt"/>
    </style:style>
    <style:style style:name="P100" style:family="paragraph" style:parent-style-name="Standard">
      <style:text-properties fo:font-size="16pt" officeooo:rsid="003f20ce" officeooo:paragraph-rsid="003f20ce" style:font-size-asian="14pt" style:font-size-complex="16pt"/>
    </style:style>
    <style:style style:name="T1" style:family="text">
      <style:text-properties officeooo:rsid="00270ad4"/>
    </style:style>
    <style:style style:name="T2" style:family="text">
      <style:text-properties officeooo:rsid="002ab9ce"/>
    </style:style>
    <style:style style:name="T3" style:family="text">
      <style:text-properties officeooo:rsid="0035b9dd"/>
    </style:style>
    <style:style style:name="T4" style:family="text">
      <style:text-properties officeooo:rsid="0038266f"/>
    </style:style>
    <style:style style:name="T5" style:family="text">
      <style:text-properties officeooo:rsid="0038c337"/>
    </style:style>
    <style:style style:name="T6" style:family="text">
      <style:text-properties officeooo:rsid="003bdf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nieres en devoluy:</text:p>
      <text:list text:style-name="L1">
        <text:list-item>
          <text:p text:style-name="P32">Scheda: <text:a xlink:type="simple" xlink:href="https://donneespubliques.meteofrance.fr/metadonnees_publiques/fiches/fiche_05139006.pdf" text:style-name="Internet_20_link" text:visited-style-name="Visited_20_Internet_20_Link">https://donneespubliques.meteofrance.fr/metadonnees_publiques/fiches/fiche_05139006.pdf</text:a></text:p>
        </text:list-item>
        <text:list-item>
          <text:p text:style-name="P32">Stazione: <text:a xlink:type="simple" xlink:href="https://www.infoclimat.fr/observations-meteo/temps-reel/test-mf-agnieres-en-devoluy/MF05139006.html" text:style-name="Internet_20_link" text:visited-style-name="Visited_20_Internet_20_Link">https://www.infoclimat.fr/observations-meteo/temps-reel/test-mf-agnieres-en-devoluy/MF05139006.html</text:a></text:p>
        </text:list-item>
        <text:list-item>
          <text:p text:style-name="P32">Coordinate: 44.696186, 5.880849</text:p>
        </text:list-item>
      </text:list>
      <text:p text:style-name="P17"/>
      <text:p text:style-name="P17"/>
      <text:p text:style-name="P2">Aiguines sapc:</text:p>
      <text:list text:style-name="L2">
        <text:list-item>
          <text:p text:style-name="P33">Scheda: <text:a xlink:type="simple" xlink:href="https://donneespubliques.meteofrance.fr/metadonnees_publiques/fiches/fiche_83002004.pdf" text:style-name="Internet_20_link" text:visited-style-name="Visited_20_Internet_20_Link">https://donneespubliques.meteofrance.fr/metadonnees_publiques/fiches/fiche_83002004.pdf</text:a></text:p>
        </text:list-item>
        <text:list-item>
          <text:p text:style-name="P33">Stazione: <text:a xlink:type="simple" xlink:href="https://www.infoclimat.fr/observations-meteo/temps-reel/aiguinessapc/MF83002004.html" text:style-name="Internet_20_link" text:visited-style-name="Visited_20_Internet_20_Link">https://www.infoclimat.fr/observations-meteo/temps-reel/aiguinessapc/MF83002004.html</text:a></text:p>
        </text:list-item>
        <text:list-item>
          <text:p text:style-name="P33">Coordinate: 43.794443, 6.244831</text:p>
        </text:list-item>
      </text:list>
      <text:p text:style-name="P18"/>
      <text:p text:style-name="P18"/>
      <text:p text:style-name="P3">Alpe d’Huez:</text:p>
      <text:list text:style-name="L3">
        <text:list-item>
          <text:p text:style-name="P34">Scheda: <text:a xlink:type="simple" xlink:href="https://donneespubliques.meteofrance.fr/metadonnees_publiques/fiches/fiche_38191002.pdf" text:style-name="Internet_20_link" text:visited-style-name="Visited_20_Internet_20_Link">https://donneespubliques.meteofrance.fr/metadonnees_publiques/fiches/fiche_38191002.pdf</text:a></text:p>
        </text:list-item>
        <text:list-item>
          <text:p text:style-name="P34">Stazione: <text:a xlink:type="simple" xlink:href="https://www.infoclimat.fr/observations-meteo/temps-reel/alpe-d-huez/MF38191002.html" text:style-name="Internet_20_link" text:visited-style-name="Visited_20_Internet_20_Link">https://www.infoclimat.fr/observations-meteo/temps-reel/alpe-d-huez/MF38191002.html</text:a></text:p>
        </text:list-item>
        <text:list-item>
          <text:p text:style-name="P34">Coordinate: 45.087868, 6.085787</text:p>
        </text:list-item>
      </text:list>
      <text:p text:style-name="P19"/>
      <text:p text:style-name="P19"/>
      <text:p text:style-name="P4">Ancelle:</text:p>
      <text:list text:style-name="L4">
        <text:list-item>
          <text:p text:style-name="P35">Scheda: <text:a xlink:type="simple" xlink:href="https://donneespubliques.meteofrance.fr/metadonnees_publiques/fiches/fiche_05004001.pdf" text:style-name="Internet_20_link" text:visited-style-name="Visited_20_Internet_20_Link">https://donneespubliques.meteofrance.fr/metadonnees_publiques/fiches/fiche_05004001.pdf</text:a></text:p>
        </text:list-item>
        <text:list-item>
          <text:p text:style-name="P35">Stazione: <text:a xlink:type="simple" xlink:href="https://www.infoclimat.fr/observations-meteo/temps-reel/test-mf-csv-ancelle/MF05004001.html" text:style-name="Internet_20_link" text:visited-style-name="Visited_20_Internet_20_Link">https://www.infoclimat.fr/observations-meteo/temps-reel/test-mf-csv-ancelle/MF05004001.html</text:a></text:p>
        </text:list-item>
        <text:list-item>
          <text:p text:style-name="P35">Coordinate: 44.624474, 6.209789</text:p>
        </text:list-item>
      </text:list>
      <text:p text:style-name="P20"/>
      <text:p text:style-name="P20"/>
      <text:p text:style-name="P5">Arvieux la chalp:</text:p>
      <text:list text:style-name="L5">
        <text:list-item>
          <text:p text:style-name="P36">Scheda: <text:a xlink:type="simple" xlink:href="https://donneespubliques.meteofrance.fr/metadonnees_publiques/fiches/fiche_05007001.pdf" text:style-name="Internet_20_link" text:visited-style-name="Visited_20_Internet_20_Link">https://donneespubliques.meteofrance.fr/metadonnees_publiques/fiches/fiche_05007001.pdf</text:a></text:p>
        </text:list-item>
        <text:list-item>
          <text:p text:style-name="P36">Stazione: <text:a xlink:type="simple" xlink:href="https://www.infoclimat.fr/observations-meteo/temps-reel/arvieux-la-chalp/MF05007001.html" text:style-name="Internet_20_link" text:visited-style-name="Visited_20_Internet_20_Link">https://www.infoclimat.fr/observations-meteo/temps-reel/arvieux-la-chalp/MF05007001.html</text:a></text:p>
        </text:list-item>
        <text:list-item>
          <text:p text:style-name="P36">Coordinate: 44.781094, 6.736641</text:p>
        </text:list-item>
      </text:list>
      <text:p text:style-name="P21"/>
      <text:p text:style-name="P21"/>
      <text:p text:style-name="P6">Autrans:</text:p>
      <text:list text:style-name="L6">
        <text:list-item>
          <text:p text:style-name="P37">Scheda: <text:a xlink:type="simple" xlink:href="https://donneespubliques.meteofrance.fr/metadonnees_publiques/fiches/fiche_38021001.pdf" text:style-name="Internet_20_link" text:visited-style-name="Visited_20_Internet_20_Link">https://donneespubliques.meteofrance.fr/metadonnees_publiques/fiches/fiche_38021001.pdf</text:a></text:p>
        </text:list-item>
        <text:list-item>
          <text:p text:style-name="P37">Stazione:<text:a xlink:type="simple" xlink:href="https://www.infoclimat.fr/observations-meteo/temps-reel/autrans/MF38021001.html" text:style-name="Internet_20_link" text:visited-style-name="Visited_20_Internet_20_Link">https://www.infoclimat.fr/observations-meteo/temps-reel/autrans/MF38021001.html</text:a></text:p>
        </text:list-item>
        <text:list-item>
          <text:p text:style-name="P37">Coordinate: 45.183151, 5.554661</text:p>
        </text:list-item>
      </text:list>
      <text:p text:style-name="P22"/>
      <text:p text:style-name="P22"/>
      <text:p text:style-name="P22"/>
      <text:p text:style-name="P22"/>
      <text:p text:style-name="P6"><text:soft-page-break/>Avrieux:</text:p>
      <text:list text:style-name="L7">
        <text:list-item>
          <text:p text:style-name="P38">Scheda: <text:a xlink:type="simple" xlink:href="https://donneespubliques.meteofrance.fr/metadonnees_publiques/fiches/fiche_73026001.pdf" text:style-name="Internet_20_link" text:visited-style-name="Visited_20_Internet_20_Link">https://donneespubliques.meteofrance.fr/metadonnees_publiques/fiches/fiche_73026001.pdf</text:a></text:p>
        </text:list-item>
        <text:list-item>
          <text:p text:style-name="P38">Stazione: <text:a xlink:type="simple" xlink:href="https://www.infoclimat.fr/observations-meteo/temps-reel/modane-avrieux/07496.html" text:style-name="Internet_20_link" text:visited-style-name="Visited_20_Internet_20_Link">https://www.infoclimat.fr/observations-meteo/temps-reel/modane-avrieux/07496.html</text:a></text:p>
        </text:list-item>
        <text:list-item>
          <text:p text:style-name="P38">Coordinate: 45.214049, 6.716683</text:p>
        </text:list-item>
      </text:list>
      <text:p text:style-name="P22"/>
      <text:p text:style-name="P22"/>
      <text:p text:style-name="P7">Beuil-obs:</text:p>
      <text:list text:style-name="L8">
        <text:list-item>
          <text:p text:style-name="P39">Scheda: <text:a xlink:type="simple" xlink:href="https://donneespubliques.meteofrance.fr/metadonnees_publiques/fiches/fiche_06016001.pdf" text:style-name="Internet_20_link" text:visited-style-name="Visited_20_Internet_20_Link">https://donneespubliques.meteofrance.fr/metadonnees_publiques/fiches/fiche_06016001.pdf</text:a></text:p>
        </text:list-item>
        <text:list-item>
          <text:p text:style-name="P39">Stazione: <text:a xlink:type="simple" xlink:href="https://www.infoclimat.fr/observations-meteo/temps-reel/test-mf-beuil-obs/MF06016001.html" text:style-name="Internet_20_link" text:visited-style-name="Visited_20_Internet_20_Link">https://www.infoclimat.fr/observations-meteo/temps-reel/test-mf-beuil-obs/MF06016001.html</text:a></text:p>
        </text:list-item>
        <text:list-item>
          <text:p text:style-name="P39">Coordinate: 44.095<text:span text:style-name="T1">470</text:span>, 6.98884<text:span text:style-name="T1">6</text:span></text:p>
        </text:list-item>
      </text:list>
      <text:p text:style-name="P23"/>
      <text:p text:style-name="P23"/>
      <text:p text:style-name="P8">Bourg St. Maurice:</text:p>
      <text:list text:style-name="L9">
        <text:list-item>
          <text:p text:style-name="P40">Scheda: <text:a xlink:type="simple" xlink:href="https://donneespubliques.meteofrance.fr/metadonnees_publiques/fiches/fiche_73054001.pdf" text:style-name="Internet_20_link" text:visited-style-name="Visited_20_Internet_20_Link">https://donneespubliques.meteofrance.fr/metadonnees_publiques/fiches/fiche_73054001.pdf</text:a></text:p>
        </text:list-item>
        <text:list-item>
          <text:p text:style-name="P40">Stazione: <text:a xlink:type="simple" xlink:href="https://www.infoclimat.fr/observations-meteo/temps-reel/bourg-st-maurice/07497.html" text:style-name="Internet_20_link" text:visited-style-name="Visited_20_Internet_20_Link">https://www.infoclimat.fr/observations-meteo/temps-reel/bourg-st-maurice/07497.html</text:a></text:p>
        </text:list-item>
        <text:list-item>
          <text:p text:style-name="P40">Coordinate: 45.612666, 6.763228</text:p>
        </text:list-item>
      </text:list>
      <text:p text:style-name="P24"/>
      <text:p text:style-name="P24"/>
      <text:p text:style-name="P8">Bozel:</text:p>
      <text:list text:style-name="L10">
        <text:list-item>
          <text:p text:style-name="P41">Scheda: <text:a xlink:type="simple" xlink:href="https://donneespubliques.meteofrance.fr/metadonnees_publiques/fiches/fiche_73055001.pdf" text:style-name="Internet_20_link" text:visited-style-name="Visited_20_Internet_20_Link">https://donneespubliques.meteofrance.fr/metadonnees_publiques/fiches/fiche_73055001.pdf</text:a></text:p>
        </text:list-item>
        <text:list-item>
          <text:p text:style-name="P41">Stazione: <text:a xlink:type="simple" xlink:href="https://www.infoclimat.fr/observations-meteo/temps-reel/test-mf-bozel/MF73055001.html" text:style-name="Internet_20_link" text:visited-style-name="Visited_20_Internet_20_Link">https://www.infoclimat.fr/observations-meteo/temps-reel/test-mf-bozel/MF73055001.html</text:a></text:p>
        </text:list-item>
        <text:list-item>
          <text:p text:style-name="P41">Coordinate: 45.440073, 6.649549</text:p>
        </text:list-item>
      </text:list>
      <text:p text:style-name="P24"/>
      <text:p text:style-name="P24"/>
      <text:p text:style-name="P9">Ceillac:</text:p>
      <text:list text:style-name="L11">
        <text:list-item>
          <text:p text:style-name="P42">Scheda: <text:a xlink:type="simple" xlink:href="https://donneespubliques.meteofrance.fr/metadonnees_publiques/fiches/fiche_05026001.pdf" text:style-name="Internet_20_link" text:visited-style-name="Visited_20_Internet_20_Link">https://donneespubliques.meteofrance.fr/metadonnees_publiques/fiches/fiche_05026001.pdf</text:a></text:p>
        </text:list-item>
        <text:list-item>
          <text:p text:style-name="P42">Stazione:<text:a xlink:type="simple" xlink:href="https://www.infoclimat.fr/observations-meteo/temps-reel/ceillac/MF05026001.html" text:style-name="Internet_20_link" text:visited-style-name="Visited_20_Internet_20_Link">https://www.infoclimat.fr/observations-meteo/temps-reel/ceillac/MF05026001.html</text:a></text:p>
        </text:list-item>
        <text:list-item>
          <text:p text:style-name="P42">Coordinate: 44.671095, 6.776301</text:p>
        </text:list-item>
      </text:list>
      <text:p text:style-name="P25"/>
      <text:p text:style-name="P25"/>
      <text:p text:style-name="P10">Chapelle en Valgaudemar:</text:p>
      <text:list text:style-name="L12">
        <text:list-item>
          <text:p text:style-name="P43">Scheda: <text:a xlink:type="simple" xlink:href="https://donneespubliques.meteofrance.fr/metadonnees_publiques/fiches/fiche_05064001.pdf" text:style-name="Internet_20_link" text:visited-style-name="Visited_20_Internet_20_Link">https://donneespubliques.meteofrance.fr/metadonnees_publiques/fiches/fiche_05064001.pdf</text:a></text:p>
        </text:list-item>
        <text:list-item>
          <text:p text:style-name="P43">Stazione: <text:a xlink:type="simple" xlink:href="https://www.infoclimat.fr/observations-meteo/temps-reel/chapelle-en-valgaudemar/MF05064001.html" text:style-name="Internet_20_link" text:visited-style-name="Visited_20_Internet_20_Link">https://www.infoclimat.fr/observations-meteo/temps-reel/chapelle-en-valgaudemar/MF05064001.html</text:a></text:p>
        </text:list-item>
        <text:list-item>
          <text:p text:style-name="P43">Coordinate: 44.810031, 6.195388</text:p>
        </text:list-item>
      </text:list>
      <text:p text:style-name="P26"/>
      <text:p text:style-name="P26"/>
      <text:p text:style-name="P26"/>
      <text:p text:style-name="P26"/>
      <text:p text:style-name="P11"><text:soft-page-break/>Co<text:span text:style-name="T2">mbloux</text:span>:</text:p>
      <text:list text:style-name="L13">
        <text:list-item>
          <text:p text:style-name="P44">Scheda: <text:a xlink:type="simple" xlink:href="https://donneespubliques.meteofrance.fr/metadonnees_publiques/fiches/fiche_74083002.pdf" text:style-name="Internet_20_link" text:visited-style-name="Visited_20_Internet_20_Link">https://donneespubliques.meteofrance.fr/metadonnees_publiques/fiches/fiche_74083002.pdf</text:a></text:p>
        </text:list-item>
        <text:list-item>
          <text:p text:style-name="P44"><text:span text:style-name="T2">Stazione:</text:span><text:a xlink:type="simple" xlink:href="https://www.infoclimat.fr/observations-meteo/temps-reel/combloux/MF74083002.html" text:style-name="Internet_20_link" text:visited-style-name="Visited_20_Internet_20_Link"><text:span text:style-name="T2">https://www.infoclimat.fr/observations-meteo/temps-reel/combloux/MF74083002.html</text:span></text:a></text:p>
        </text:list-item>
        <text:list-item>
          <text:p text:style-name="P45">Coordinate: 45.892901, 6.626764</text:p>
        </text:list-item>
      </text:list>
      <text:p text:style-name="P27"/>
      <text:p text:style-name="P27"/>
      <text:p text:style-name="P12">Glandage sapc:</text:p>
      <text:list text:style-name="L14">
        <text:list-item>
          <text:p text:style-name="P46">Scheda: <text:a xlink:type="simple" xlink:href="https://donneespubliques.meteofrance.fr/metadonnees_publiques/fiches/fiche_26142001.pdf" text:style-name="Internet_20_link" text:visited-style-name="Visited_20_Internet_20_Link">https://donneespubliques.meteofrance.fr/metadonnees_publiques/fiches/fiche_26142001.pdf</text:a></text:p>
        </text:list-item>
        <text:list-item>
          <text:p text:style-name="P46">Stazione: <text:a xlink:type="simple" xlink:href="https://www.infoclimat.fr/observations-meteo/temps-reel/glandagesapc/MF26142001.html" text:style-name="Internet_20_link" text:visited-style-name="Visited_20_Internet_20_Link">https://www.infoclimat.fr/observations-meteo/temps-reel/glandagesapc/MF26142001.html</text:a></text:p>
        </text:list-item>
        <text:list-item>
          <text:p text:style-name="P46">Coordinate: 44.674693, 5.615233</text:p>
        </text:list-item>
      </text:list>
      <text:p text:style-name="P28"/>
      <text:p text:style-name="P28"/>
      <text:p text:style-name="P13">Isola:</text:p>
      <text:list text:style-name="L15">
        <text:list-item>
          <text:p text:style-name="P47">Scheda: <text:a xlink:type="simple" xlink:href="https://donneespubliques.meteofrance.fr/metadonnees_publiques/fiches/fiche_06073005.pdf" text:style-name="Internet_20_link" text:visited-style-name="Visited_20_Internet_20_Link">https://donneespubliques.meteofrance.fr/metadonnees_publiques/fiches/fiche_06073005.pdf</text:a></text:p>
        </text:list-item>
        <text:list-item>
          <text:p text:style-name="P47">Stazione: <text:a xlink:type="simple" xlink:href="https://www.infoclimat.fr/observations-meteo/temps-reel/isola-2000/MF06073005.html" text:style-name="Internet_20_link" text:visited-style-name="Visited_20_Internet_20_Link">https://www.infoclimat.fr/observations-meteo/temps-reel/isola-2000/MF06073005.html</text:a></text:p>
        </text:list-item>
        <text:list-item>
          <text:p text:style-name="P47">Coordinate: 44.189410, 7.149064</text:p>
        </text:list-item>
      </text:list>
      <text:p text:style-name="P28"/>
      <text:p text:style-name="P28"/>
      <text:p text:style-name="P14">Le tour:</text:p>
      <text:list text:style-name="L16">
        <text:list-item>
          <text:p text:style-name="P48">Scheda: <text:a xlink:type="simple" xlink:href="https://donneespubliques.meteofrance.fr/metadonnees_publiques/fiches/fiche_74056005.pdf" text:style-name="Internet_20_link" text:visited-style-name="Visited_20_Internet_20_Link">https://donneespubliques.meteofrance.fr/metadonnees_publiques/fiches/fiche_74056005.pdf</text:a></text:p>
        </text:list-item>
        <text:list-item>
          <text:p text:style-name="P48">Stazione:<text:a xlink:type="simple" xlink:href="https://www.infoclimat.fr/observations-meteo/temps-reel/le-tour/MF74056005.html" text:style-name="Internet_20_link" text:visited-style-name="Visited_20_Internet_20_Link">https://www.infoclimat.fr/observations-meteo/temps-reel/le-tour/MF74056005.html</text:a></text:p>
        </text:list-item>
        <text:list-item>
          <text:p text:style-name="P48">Coordinate: 46.003874, 6.948426</text:p>
        </text:list-item>
      </text:list>
      <text:p text:style-name="P29"/>
      <text:p text:style-name="P29"/>
      <text:p text:style-name="P15">Villar d’Arene:</text:p>
      <text:list text:style-name="L17">
        <text:list-item>
          <text:p text:style-name="P49">Scheda: <text:a xlink:type="simple" xlink:href="https://donneespubliques.meteofrance.fr/metadonnees_publiques/fiches/fiche_05181002.pdf" text:style-name="Internet_20_link" text:visited-style-name="Visited_20_Internet_20_Link">https://donneespubliques.meteofrance.fr/metadonnees_publiques/fiches/fiche_05181002.pdf</text:a></text:p>
        </text:list-item>
        <text:list-item>
          <text:p text:style-name="P49">Stazione: <text:a xlink:type="simple" xlink:href="https://www.infoclimat.fr/observations-meteo/temps-reel/villar-d-arene/MF05181002.html" text:style-name="Internet_20_link" text:visited-style-name="Visited_20_Internet_20_Link">https://www.infoclimat.fr/observations-meteo/temps-reel/villar-d-arene/MF05181002.html</text:a></text:p>
        </text:list-item>
        <text:list-item>
          <text:p text:style-name="P49">Coordinate: 45.030931, 6.361645</text:p>
        </text:list-item>
      </text:list>
      <text:p text:style-name="P30"/>
      <text:p text:style-name="P30"/>
      <text:p text:style-name="P15">Villar Loubiere:</text:p>
      <text:list text:style-name="L18">
        <text:list-item>
          <text:p text:style-name="P50">Scheda: <text:a xlink:type="simple" xlink:href="https://donneespubliques.meteofrance.fr/metadonnees_publiques/fiches/fiche_05182001.pdf" text:style-name="Internet_20_link" text:visited-style-name="Visited_20_Internet_20_Link">https://donneespubliques.meteofrance.fr/metadonnees_publiques/fiches/fiche_05182001.pdf</text:a></text:p>
        </text:list-item>
        <text:list-item>
          <text:p text:style-name="P50">Stazione: <text:a xlink:type="simple" xlink:href="https://www.infoclimat.fr/observations-meteo/temps-reel/villar-loubiere/MF05182001.html" text:style-name="Internet_20_link" text:visited-style-name="Visited_20_Internet_20_Link">https://www.infoclimat.fr/observations-meteo/temps-reel/villar-loubiere/MF05182001.html</text:a></text:p>
        </text:list-item>
        <text:list-item>
          <text:p text:style-name="P50">Coordinate: 44.826932, 6.146080</text:p>
        </text:list-item>
      </text:list>
      <text:p text:style-name="P30"/>
      <text:p text:style-name="P30"/>
      <text:p text:style-name="P30"/>
      <text:p text:style-name="P30"/>
      <text:p text:style-name="P15"><text:soft-page-break/>Villar st. Pancrace:</text:p>
      <text:list text:style-name="L19">
        <text:list-item>
          <text:p text:style-name="P51">Scheda: <text:a xlink:type="simple" xlink:href="https://donneespubliques.meteofrance.fr/metadonnees_publiques/fiches/fiche_05183001.pdf" text:style-name="Internet_20_link" text:visited-style-name="Visited_20_Internet_20_Link">https://donneespubliques.meteofrance.fr/metadonnees_publiques/fiches/fiche_05183001.pdf</text:a></text:p>
        </text:list-item>
        <text:list-item>
          <text:p text:style-name="P51">Stazione: <text:a xlink:type="simple" xlink:href="https://donneespubliques.meteofrance.fr/metadonnees_publiques/fiches/fiche_05183001.pdf" text:style-name="Internet_20_link" text:visited-style-name="Visited_20_Internet_20_Link">https://donneespubliques.meteofrance.fr/metadonnees_publiques/fiches/fiche_05183001.pdf</text:a></text:p>
        </text:list-item>
        <text:list-item>
          <text:p text:style-name="P51">Coordinate: 44.880349, 6.640342</text:p>
        </text:list-item>
      </text:list>
      <text:p text:style-name="P30"/>
      <text:p text:style-name="P30"/>
      <text:p text:style-name="P15">Vaujany: </text:p>
      <text:list text:style-name="L20">
        <text:list-item>
          <text:p text:style-name="P52">Scheda: <text:a xlink:type="simple" xlink:href="https://donneespubliques.meteofrance.fr/metadonnees_publiques/fiches/fiche_38527001.pdf" text:style-name="Internet_20_link" text:visited-style-name="Visited_20_Internet_20_Link">https://donneespubliques.meteofrance.fr/metadonnees_publiques/fiches/fiche_38527001.pdf</text:a></text:p>
        </text:list-item>
        <text:list-item>
          <text:p text:style-name="P53">Stazione: <text:a xlink:type="simple" xlink:href="https://www.infoclimat.fr/observations-meteo/temps-reel/test-mf-vaujany/MF38527001.html" text:style-name="Internet_20_link" text:visited-style-name="Visited_20_Internet_20_Link">https://www.infoclimat.fr/observations-meteo/temps-reel/test-mf-vaujany/MF38527001.html</text:a></text:p>
        </text:list-item>
        <text:list-item>
          <text:p text:style-name="P53">Coordinate: 45.149149, 6.047245</text:p>
        </text:list-item>
      </text:list>
      <text:p text:style-name="P31"/>
      <text:p text:style-name="P31"/>
      <text:p text:style-name="P16">Trevignin:</text:p>
      <text:list text:style-name="L21">
        <text:list-item>
          <text:p text:style-name="P54">Scheda: <text:a xlink:type="simple" xlink:href="https://donneespubliques.meteofrance.fr/metadonnees_publiques/fiches/fiche_73301001.pdf" text:style-name="Internet_20_link" text:visited-style-name="Visited_20_Internet_20_Link">https://donneespubliques.meteofrance.fr/metadonnees_publiques/fiches/fiche_73301001.pdf</text:a></text:p>
        </text:list-item>
        <text:list-item>
          <text:p text:style-name="P54">Stazione: <text:a xlink:type="simple" xlink:href="https://www.infoclimat.fr/observations-meteo/temps-reel/trevignin/MF73301001.html" text:style-name="Internet_20_link" text:visited-style-name="Visited_20_Internet_20_Link">https://www.infoclimat.fr/observations-meteo/temps-reel/trevignin/MF73301001.html</text:a></text:p>
        </text:list-item>
        <text:list-item>
          <text:p text:style-name="P54">Coordinate: 45.706937, 5.977266</text:p>
        </text:list-item>
      </text:list>
      <text:p text:style-name="P55"/>
      <text:p text:style-name="P55"/>
      <text:p text:style-name="P89">Tende Casterino:</text:p>
      <text:list text:style-name="L22">
        <text:list-item>
          <text:p text:style-name="P57">Scheda: <text:a xlink:type="simple" xlink:href="https://www.infoclimat.fr/stations/metadonnees.php?id=000ZC" text:style-name="Internet_20_link" text:visited-style-name="Visited_20_Internet_20_Link">https://www.infoclimat.fr/stations/metadonnees.php?id=000ZC</text:a></text:p>
        </text:list-item>
        <text:list-item>
          <text:p text:style-name="P57">Stazione: <text:a xlink:type="simple" xlink:href="https://www.infoclimat.fr/observations-meteo/temps-reel/tende-casterino/000ZC.html" text:style-name="Internet_20_link" text:visited-style-name="Visited_20_Internet_20_Link">https://www.infoclimat.fr/observations-meteo/temps-reel/tende-casterino/000ZC.html</text:a></text:p>
        </text:list-item>
        <text:list-item>
          <text:p text:style-name="P57">Coordinate: 44.097608, 7.505918</text:p>
        </text:list-item>
      </text:list>
      <text:p text:style-name="P56"/>
      <text:p text:style-name="P56"/>
      <text:p text:style-name="P90">Saint Michel de Maurienne:</text:p>
      <text:list text:style-name="L23">
        <text:list-item>
          <text:p text:style-name="P59">Scheda: <text:a xlink:type="simple" xlink:href="https://donneespubliques.meteofrance.fr/metadonnees_publiques/fiches/fiche_73261001.pdf" text:style-name="Internet_20_link" text:visited-style-name="Visited_20_Internet_20_Link">https://donneespubliques.meteofrance.fr/metadonnees_publiques/fiches/fiche_73261001.pdf</text:a></text:p>
        </text:list-item>
        <text:list-item>
          <text:p text:style-name="P59">Stazione: <text:a xlink:type="simple" xlink:href="https://www.infoclimat.fr/observations-meteo/temps-reel/st-michel-de-maurienne/MF73261001.html" text:style-name="Internet_20_link" text:visited-style-name="Visited_20_Internet_20_Link">https://www.infoclimat.fr/observations-meteo/temps-reel/st-michel-de-maurienne/MF73261001.html</text:a></text:p>
        </text:list-item>
        <text:list-item>
          <text:p text:style-name="P59">Coordinate: 45.223679, 6.490916</text:p>
        </text:list-item>
      </text:list>
      <text:p text:style-name="P58"/>
      <text:p text:style-name="P58"/>
      <text:p text:style-name="P91">Saint Martin de Belleville:</text:p>
      <text:list text:style-name="L24">
        <text:list-item>
          <text:p text:style-name="P61">Scheda: <text:a xlink:type="simple" xlink:href="https://donneespubliques.meteofrance.fr/metadonnees_publiques/fiches/fiche_73257001.pdf" text:style-name="Internet_20_link" text:visited-style-name="Visited_20_Internet_20_Link">https://donneespubliques.meteofrance.fr/metadonnees_publiques/fiches/fiche_73257001.pdf</text:a></text:p>
        </text:list-item>
        <text:list-item>
          <text:p text:style-name="P61">Stazione: <text:a xlink:type="simple" xlink:href="https://www.infoclimat.fr/observations-meteo/temps-reel/st-martin-de-belleville/MF73257001.html" text:style-name="Internet_20_link" text:visited-style-name="Visited_20_Internet_20_Link">https://www.infoclimat.fr/observations-meteo/temps-reel/st-martin-de-belleville/MF73257001.html</text:a></text:p>
        </text:list-item>
        <text:list-item>
          <text:p text:style-name="P61">Coordinate: 45.368022, 6.510559</text:p>
        </text:list-item>
      </text:list>
      <text:p text:style-name="P60"/>
      <text:p text:style-name="P60"/>
      <text:p text:style-name="P60"/>
      <text:p text:style-name="P60"/>
      <text:p text:style-name="P60"/>
      <text:p text:style-name="P92"><text:soft-page-break/>Saint Jean – Saint Nicolas:</text:p>
      <text:list text:style-name="L25">
        <text:list-item>
          <text:p text:style-name="P63">Scheda: <text:a xlink:type="simple" xlink:href="https://donneespubliques.meteofrance.fr/metadonnees_publiques/fiches/fiche_05145002.pdf" text:style-name="Internet_20_link" text:visited-style-name="Visited_20_Internet_20_Link">https://donneespubliques.meteofrance.fr/metadonnees_publiques/fiches/fiche_05145002.pdf</text:a></text:p>
        </text:list-item>
        <text:list-item>
          <text:p text:style-name="P63">Stazione: <text:a xlink:type="simple" xlink:href="https://www.infoclimat.fr/observations-meteo/temps-reel/st-jean-st-nicolas/MF05145002.html" text:style-name="Internet_20_link" text:visited-style-name="Visited_20_Internet_20_Link">https://www.infoclimat.fr/observations-meteo/temps-reel/st-jean-st-nicolas/MF05145002.html</text:a></text:p>
        </text:list-item>
        <text:list-item>
          <text:p text:style-name="P63">Coordinate: <text:span text:style-name="T3">44.670839, 6.209935</text:span></text:p>
        </text:list-item>
      </text:list>
      <text:p text:style-name="P62"/>
      <text:p text:style-name="P62"/>
      <text:p text:style-name="P93">Saint Etienne en Denvoluy:</text:p>
      <text:list text:style-name="L26">
        <text:list-item>
          <text:p text:style-name="P65">Scheda: <text:a xlink:type="simple" xlink:href="https://donneespubliques.meteofrance.fr/metadonnees_publiques/fiches/fiche_05139002.pdf" text:style-name="Internet_20_link" text:visited-style-name="Visited_20_Internet_20_Link">https://donneespubliques.meteofrance.fr/metadonnees_publiques/fiches/fiche_05139002.pdf</text:a></text:p>
        </text:list-item>
        <text:list-item>
          <text:p text:style-name="P65">Stazione: <text:a xlink:type="simple" xlink:href="https://www.infoclimat.fr/observations-meteo/temps-reel/st-etienne-en-devoluy/MF05139002.html" text:style-name="Internet_20_link" text:visited-style-name="Visited_20_Internet_20_Link">https://www.infoclimat.fr/observations-meteo/temps-reel/st-etienne-en-devoluy/MF05139002.html</text:a></text:p>
        </text:list-item>
        <text:list-item>
          <text:p text:style-name="P65">Coordinate: 44.694431, 5.940491</text:p>
        </text:list-item>
      </text:list>
      <text:p text:style-name="P64"/>
      <text:p text:style-name="P64"/>
      <text:p text:style-name="P93">Saint Colomban des Villards:</text:p>
      <text:list text:style-name="L27">
        <text:list-item>
          <text:p text:style-name="P66">Scheda: <text:a xlink:type="simple" xlink:href="https://donneespubliques.meteofrance.fr/metadonnees_publiques/fiches/fiche_73230002.pdf" text:style-name="Internet_20_link" text:visited-style-name="Visited_20_Internet_20_Link">https://donneespubliques.meteofrance.fr/metadonnees_publiques/fiches/fiche_73230002.pdf</text:a></text:p>
        </text:list-item>
        <text:list-item>
          <text:p text:style-name="P66"><text:span text:style-name="T4">Stazione: </text:span><text:a xlink:type="simple" xlink:href="https://www.infoclimat.fr/observations-meteo/temps-reel/st-colomban-des-villards/MF73230002.html" text:style-name="Internet_20_link" text:visited-style-name="Visited_20_Internet_20_Link">https://www.infoclimat.fr/observations-meteo/temps-reel/st-colomban-des-villards/MF73230002.html</text:a></text:p>
        </text:list-item>
        <text:list-item>
          <text:p text:style-name="P66">Coordinate: 45.293105, 6.230821</text:p>
        </text:list-item>
      </text:list>
      <text:p text:style-name="P64"/>
      <text:p text:style-name="P64"/>
      <text:p text:style-name="P94">Saint Baudille:</text:p>
      <text:list text:style-name="L28">
        <text:list-item>
          <text:p text:style-name="P68">Scheda: <text:a xlink:type="simple" xlink:href="https://donneespubliques.meteofrance.fr/metadonnees_publiques/fiches/fiche_38366001.pdf" text:style-name="Internet_20_link" text:visited-style-name="Visited_20_Internet_20_Link">https://donneespubliques.meteofrance.fr/metadonnees_publiques/fiches/fiche_38366001.pdf</text:a></text:p>
        </text:list-item>
        <text:list-item>
          <text:p text:style-name="P68">Stazione: <text:a xlink:type="simple" xlink:href="https://www.infoclimat.fr/observations-meteo/temps-reel/st-baudille/MF38366001.html" text:style-name="Internet_20_link" text:visited-style-name="Visited_20_Internet_20_Link">https://www.infoclimat.fr/observations-meteo/temps-reel/st-baudille/MF38366001.html</text:a></text:p>
        </text:list-item>
        <text:list-item>
          <text:p text:style-name="P68">Coordinate: 44.796016, 5.796249</text:p>
        </text:list-item>
      </text:list>
      <text:p text:style-name="P67"/>
      <text:p text:style-name="P67"/>
      <text:p text:style-name="P94">Samoens:</text:p>
      <text:list text:style-name="L29">
        <text:list-item>
          <text:p text:style-name="P69">Scheda: <text:a xlink:type="simple" xlink:href="https://donneespubliques.meteofrance.fr/metadonnees_publiques/fiches/fiche_74258002.pdf" text:style-name="Internet_20_link" text:visited-style-name="Visited_20_Internet_20_Link">https://donneespubliques.meteofrance.fr/metadonnees_publiques/fiches/fiche_74258002.pdf</text:a></text:p>
        </text:list-item>
        <text:list-item>
          <text:p text:style-name="P69">Stazione:<text:a xlink:type="simple" xlink:href="https://www.infoclimat.fr/observations-meteo/temps-reel/samoens/MF74258002.html" text:style-name="Internet_20_link" text:visited-style-name="Visited_20_Internet_20_Link">https://www.infoclimat.fr/observations-meteo/temps-reel/samoens/MF74258002.html</text:a></text:p>
        </text:list-item>
        <text:list-item>
          <text:p text:style-name="P69">Coordinate: 46.086686, 6.726660</text:p>
        </text:list-item>
      </text:list>
      <text:p text:style-name="P67"/>
      <text:p text:style-name="P67"/>
      <text:p text:style-name="P94">Ristolas:</text:p>
      <text:list text:style-name="L30">
        <text:list-item>
          <text:p text:style-name="P70">Scheda: <text:a xlink:type="simple" xlink:href="https://donneespubliques.meteofrance.fr/metadonnees_publiques/fiches/fiche_05120002.pdf" text:style-name="Internet_20_link" text:visited-style-name="Visited_20_Internet_20_Link">https://donneespubliques.meteofrance.fr/metadonnees_publiques/fiches/fiche_05120002.pdf</text:a></text:p>
        </text:list-item>
        <text:list-item>
          <text:p text:style-name="P70">Stazione:<text:a xlink:type="simple" xlink:href="https://www.infoclimat.fr/observations-meteo/temps-reel/ristolas/MF05120002.html" text:style-name="Internet_20_link" text:visited-style-name="Visited_20_Internet_20_Link">https://www.infoclimat.fr/observations-meteo/temps-reel/ristolas/MF05120002.html</text:a></text:p>
        </text:list-item>
        <text:list-item>
          <text:p text:style-name="P70">Coordinate: <text:span text:style-name="T5">44.765642, 6.984536</text:span></text:p>
        </text:list-item>
      </text:list>
      <text:p text:style-name="P67"/>
      <text:p text:style-name="P67"/>
      <text:p text:style-name="P67"/>
      <text:p text:style-name="P67"/>
      <text:p text:style-name="P95"><text:soft-page-break/>Peone:</text:p>
      <text:list text:style-name="L32">
        <text:list-item>
          <text:p text:style-name="P71">Scheda: <text:a xlink:type="simple" xlink:href="https://donneespubliques.meteofrance.fr/metadonnees_publiques/fiches/fiche_06094002.pdf" text:style-name="Internet_20_link" text:visited-style-name="Visited_20_Internet_20_Link">https://donneespubliques.meteofrance.fr/metadonnees_publiques/fiches/fiche_06094002.pdf</text:a></text:p>
        </text:list-item>
        <text:list-item>
          <text:p text:style-name="P72">Stazione:<text:a xlink:type="simple" xlink:href="https://www.infoclimat.fr/observations-meteo/temps-reel/peone/MF06094002.html" text:style-name="Internet_20_link" text:visited-style-name="Visited_20_Internet_20_Link">https://www.infoclimat.fr/observations-meteo/temps-reel/peone/MF06094002.html</text:a></text:p>
        </text:list-item>
        <text:list-item>
          <text:p text:style-name="P72">Coordinate: 44.099740, 6.930998</text:p>
        </text:list-item>
      </text:list>
      <text:p text:style-name="P73"/>
      <text:p text:style-name="P73"/>
      <text:p text:style-name="P96">Pelvoux:</text:p>
      <text:list text:style-name="L33">
        <text:list-item>
          <text:p text:style-name="P74">Scheda: <text:a xlink:type="simple" xlink:href="https://donneespubliques.meteofrance.fr/metadonnees_publiques/fiches/fiche_05101001.pdf" text:style-name="Internet_20_link" text:visited-style-name="Visited_20_Internet_20_Link">https://donneespubliques.meteofrance.fr/metadonnees_publiques/fiches/fiche_05101001.pdf</text:a></text:p>
        </text:list-item>
        <text:list-item>
          <text:p text:style-name="P74">Stazione:<text:a xlink:type="simple" xlink:href="https://www.infoclimat.fr/observations-meteo/temps-reel/pelvoux/MF05101001.html" text:style-name="Internet_20_link" text:visited-style-name="Visited_20_Internet_20_Link">https://www.infoclimat.fr/observations-meteo/temps-reel/pelvoux/MF05101001.html</text:a></text:p>
        </text:list-item>
        <text:list-item>
          <text:p text:style-name="P74">Coordinate: 44.866830, 6.486638</text:p>
        </text:list-item>
      </text:list>
      <text:p text:style-name="P73"/>
      <text:p text:style-name="P73"/>
      <text:p text:style-name="P96">Peisey Nancroix:</text:p>
      <text:list text:style-name="L34">
        <text:list-item>
          <text:p text:style-name="P75">Scheda: <text:a xlink:type="simple" xlink:href="https://donneespubliques.meteofrance.fr/metadonnees_publiques/fiches/fiche_73197001.pdf" text:style-name="Internet_20_link" text:visited-style-name="Visited_20_Internet_20_Link">https://donneespubliques.meteofrance.fr/metadonnees_publiques/fiches/fiche_73197001.pdf</text:a></text:p>
        </text:list-item>
        <text:list-item>
          <text:p text:style-name="P75">Stazione: <text:a xlink:type="simple" xlink:href="https://donneespubliques.meteofrance.fr/metadonnees_publiques/fiches/fiche_73197001.pdf" text:style-name="Internet_20_link" text:visited-style-name="Visited_20_Internet_20_Link">https://donneespubliques.meteofrance.fr/metadonnees_publiques/fiches/fiche_73197001.pdf</text:a></text:p>
        </text:list-item>
        <text:list-item>
          <text:p text:style-name="P75">Coordinate: <text:span text:style-name="T6">45.544025, 6.756494</text:span></text:p>
        </text:list-item>
      </text:list>
      <text:p text:style-name="P73"/>
      <text:p text:style-name="P73"/>
      <text:p text:style-name="P97">Peira Cava:</text:p>
      <text:list text:style-name="L35">
        <text:list-item>
          <text:p text:style-name="P77">Scheda: <text:a xlink:type="simple" xlink:href="https://donneespubliques.meteofrance.fr/metadonnees_publiques/fiches/fiche_06077006.pdf" text:style-name="Internet_20_link" text:visited-style-name="Visited_20_Internet_20_Link">https://donneespubliques.meteofrance.fr/metadonnees_publiques/fiches/fiche_06077006.pdf</text:a></text:p>
        </text:list-item>
        <text:list-item>
          <text:p text:style-name="P77">Stazione: <text:a xlink:type="simple" xlink:href="https://donneespubliques.meteofrance.fr/metadonnees_publiques/fiches/fiche_06077006.pdf" text:style-name="Internet_20_link" text:visited-style-name="Visited_20_Internet_20_Link">https://donneespubliques.meteofrance.fr/metadonnees_publiques/fiches/fiche_06077006.pdf</text:a></text:p>
        </text:list-item>
        <text:list-item>
          <text:p text:style-name="P77">Coordinate: 43.929337, 7.363215</text:p>
        </text:list-item>
      </text:list>
      <text:p text:style-name="P76"/>
      <text:p text:style-name="P76"/>
      <text:p text:style-name="P97">Ornon: </text:p>
      <text:list text:style-name="L36">
        <text:list-item>
          <text:p text:style-name="P78">Scheda: <text:a xlink:type="simple" xlink:href="https://donneespubliques.meteofrance.fr/metadonnees_publiques/fiches/fiche_38285001.pdf" text:style-name="Internet_20_link" text:visited-style-name="Visited_20_Internet_20_Link">https://donneespubliques.meteofrance.fr/metadonnees_publiques/fiches/fiche_38285001.pdf</text:a></text:p>
        </text:list-item>
        <text:list-item>
          <text:p text:style-name="P78">Stazione: <text:a xlink:type="simple" xlink:href="https://www.infoclimat.fr/observations-meteo/temps-reel/test-mf-ornon/MF38285001.html" text:style-name="Internet_20_link" text:visited-style-name="Visited_20_Internet_20_Link">https://www.infoclimat.fr/observations-meteo/temps-reel/test-mf-ornon/MF38285001.html</text:a></text:p>
        </text:list-item>
        <text:list-item>
          <text:p text:style-name="P78">Coordinate: 45.051691, 5.987409</text:p>
        </text:list-item>
      </text:list>
      <text:p text:style-name="P76"/>
      <text:p text:style-name="P76"/>
      <text:p text:style-name="P98">Motte molines:</text:p>
      <text:list text:style-name="L37">
        <text:list-item>
          <text:p text:style-name="P80">Scheda: <text:a xlink:type="simple" xlink:href="https://donneespubliques.meteofrance.fr/metadonnees_publiques/fiches/fiche_05090002.pdf" text:style-name="Internet_20_link" text:visited-style-name="Visited_20_Internet_20_Link">https://donneespubliques.meteofrance.fr/metadonnees_publiques/fiches/fiche_05090002.pdf</text:a></text:p>
        </text:list-item>
        <text:list-item>
          <text:p text:style-name="P80">Stazione: <text:a xlink:type="simple" xlink:href="https://www.infoclimat.fr/observations-meteo/temps-reel/test-mf-motte-molines/MF05090002.html" text:style-name="Internet_20_link" text:visited-style-name="Visited_20_Internet_20_Link">https://www.infoclimat.fr/observations-meteo/temps-reel/test-mf-motte-molines/MF05090002.html</text:a></text:p>
        </text:list-item>
        <text:list-item>
          <text:p text:style-name="P80">Coordinate: 44.748157, 6.122377</text:p>
        </text:list-item>
      </text:list>
      <text:p text:style-name="P79"/>
      <text:p text:style-name="P79"/>
      <text:p text:style-name="P79"/>
      <text:p text:style-name="P79"/>
      <text:p text:style-name="P79"/>
      <text:p text:style-name="P98"><text:soft-page-break/>Montgenevre:</text:p>
      <text:list text:style-name="L38">
        <text:list-item>
          <text:p text:style-name="P81">Scheda: <text:a xlink:type="simple" xlink:href="https://donneespubliques.meteofrance.fr/metadonnees_publiques/fiches/fiche_05085001.pdf" text:style-name="Internet_20_link" text:visited-style-name="Visited_20_Internet_20_Link">https://donneespubliques.meteofrance.fr/metadonnees_publiques/fiches/fiche_05085001.pdf</text:a></text:p>
        </text:list-item>
        <text:list-item>
          <text:p text:style-name="P81">Stazione: <text:a xlink:type="simple" xlink:href="https://www.infoclimat.fr/observations-meteo/temps-reel/montgenevre/MF05085001.html" text:style-name="Internet_20_link" text:visited-style-name="Visited_20_Internet_20_Link">https://www.infoclimat.fr/observations-meteo/temps-reel/montgenevre/MF05085001.html</text:a></text:p>
        </text:list-item>
        <text:list-item>
          <text:p text:style-name="P81">Coordinate: 44.930422, 6.721367</text:p>
        </text:list-item>
      </text:list>
      <text:p text:style-name="P79"/>
      <text:p text:style-name="P79"/>
      <text:p text:style-name="P98">Mont Cenis:</text:p>
      <text:list text:style-name="L39">
        <text:list-item>
          <text:p text:style-name="P82">Scheda: <text:a xlink:type="simple" xlink:href="https://donneespubliques.meteofrance.fr/metadonnees_publiques/fiches/fiche_73144001.pdf" text:style-name="Internet_20_link" text:visited-style-name="Visited_20_Internet_20_Link">https://donneespubliques.meteofrance.fr/metadonnees_publiques/fiches/fiche_73144001.pdf</text:a></text:p>
        </text:list-item>
        <text:list-item>
          <text:p text:style-name="P82">Stazione: <text:a xlink:type="simple" xlink:href="https://www.infoclimat.fr/observations-meteo/temps-reel/mont-cenis/MF73144001.html" text:style-name="Internet_20_link" text:visited-style-name="Visited_20_Internet_20_Link">https://www.infoclimat.fr/observations-meteo/temps-reel/mont-cenis/MF73144001.html</text:a></text:p>
        </text:list-item>
        <text:list-item>
          <text:p text:style-name="P82">Coordinate: 45.269425, 6.899202</text:p>
        </text:list-item>
      </text:list>
      <text:p text:style-name="P79"/>
      <text:p text:style-name="P79"/>
      <text:p text:style-name="P99">Mont Arbois:</text:p>
      <text:list text:style-name="L40">
        <text:list-item>
          <text:p text:style-name="P84">Scheda: <text:a xlink:type="simple" xlink:href="https://donneespubliques.meteofrance.fr/metadonnees_publiques/fiches/fiche_74236002.pdf" text:style-name="Internet_20_link" text:visited-style-name="Visited_20_Internet_20_Link">https://donneespubliques.meteofrance.fr/metadonnees_publiques/fiches/fiche_74236002.pdf</text:a></text:p>
        </text:list-item>
        <text:list-item>
          <text:p text:style-name="P84">Stazione: <text:a xlink:type="simple" xlink:href="https://www.infoclimat.fr/observations-meteo/temps-reel/mont-arbois/MF74236002.html" text:style-name="Internet_20_link" text:visited-style-name="Visited_20_Internet_20_Link">https://www.infoclimat.fr/observations-meteo/temps-reel/mont-arbois/MF74236002.html</text:a></text:p>
        </text:list-item>
        <text:list-item>
          <text:p text:style-name="P84">Coordinate: 45.855400, 6.669001</text:p>
        </text:list-item>
      </text:list>
      <text:p text:style-name="P83"/>
      <text:p text:style-name="P83"/>
      <text:p text:style-name="P100">Meailles – sapc:</text:p>
      <text:list text:style-name="L42">
        <text:list-item>
          <text:p text:style-name="P87">Scheda: <text:a xlink:type="simple" xlink:href="https://donneespubliques.meteofrance.fr/metadonnees_publiques/fiches/fiche_04115001.pdf" text:style-name="Internet_20_link" text:visited-style-name="Visited_20_Internet_20_Link">https://donneespubliques.meteofrance.fr/metadonnees_publiques/fiches/fiche_04115001.pdf</text:a></text:p>
        </text:list-item>
        <text:list-item>
          <text:p text:style-name="P87">Stazione: <text:a xlink:type="simple" xlink:href="https://www.infoclimat.fr/observations-meteo/temps-reel/meaillessapc/MF04115001.html" text:style-name="Internet_20_link" text:visited-style-name="Visited_20_Internet_20_Link">https://www.infoclimat.fr/observations-meteo/temps-reel/meaillessapc/MF04115001.html</text:a></text:p>
        </text:list-item>
        <text:list-item>
          <text:p text:style-name="P87">Coordinate: 44.031158, 6.629336</text:p>
        </text:list-item>
      </text:list>
      <text:p text:style-name="P86"/>
      <text:p text:style-name="P86"/>
      <text:p text:style-name="P100">Lus La Croix Haute:</text:p>
      <text:list text:style-name="L43">
        <text:list-item>
          <text:p text:style-name="P88">Scheda: <text:a xlink:type="simple" xlink:href="https://donneespubliques.meteofrance.fr/metadonnees_publiques/fiches/fiche_26168001.pdf" text:style-name="Internet_20_link" text:visited-style-name="Visited_20_Internet_20_Link">https://donneespubliques.meteofrance.fr/metadonnees_publiques/fiches/fiche_26168001.pdf</text:a></text:p>
        </text:list-item>
        <text:list-item>
          <text:p text:style-name="P88">Stazione: <text:a xlink:type="simple" xlink:href="https://donneespubliques.meteofrance.fr/metadonnees_publiques/fiches/fiche_26168001.pdf" text:style-name="Internet_20_link" text:visited-style-name="Visited_20_Internet_20_Link">https://donneespubliques.meteofrance.fr/metadonnees_publiques/fiches/fiche_26168001.pdf</text:a></text:p>
        </text:list-item>
        <text:list-item>
          <text:p text:style-name="P88">Coordinate: 44.672734, 5.710796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4:41:33.843563802</meta:creation-date>
    <dc:date>2026-03-23T19:02:15.815616105</dc:date>
    <meta:editing-duration>PT2H22M7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7" meta:paragraph-count="164" meta:word-count="485" meta:character-count="9745" meta:non-whitespace-character-count="9543"/>
  </office:meta>
</office:document-meta>
</file>